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0.959cm"/>
    </style:style>
    <style:style style:name="co2" style:family="table-column">
      <style:table-column-properties fo:break-before="auto" style:column-width="2.268cm"/>
    </style:style>
    <style:style style:name="co3" style:family="table-column">
      <style:table-column-properties fo:break-before="auto" style:column-width="7.218cm"/>
    </style:style>
    <style:style style:name="co4" style:family="table-column">
      <style:table-column-properties fo:break-before="auto" style:column-width="2.133cm"/>
    </style:style>
    <style:style style:name="co5" style:family="table-column">
      <style:table-column-properties fo:break-before="auto" style:column-width="12.338cm"/>
    </style:style>
    <style:style style:name="co6" style:family="table-column">
      <style:table-column-properties fo:break-before="auto" style:column-width="9.424cm"/>
    </style:style>
    <style:style style:name="co7" style:family="table-column">
      <style:table-column-properties fo:break-before="auto" style:column-width="2.704cm"/>
    </style:style>
    <style:style style:name="co8" style:family="table-column">
      <style:table-column-properties fo:break-before="auto" style:column-width="2.732cm"/>
    </style:style>
    <style:style style:name="co9" style:family="table-column">
      <style:table-column-properties fo:break-before="auto" style:column-width="1.942cm"/>
    </style:style>
    <style:style style:name="co10" style:family="table-column">
      <style:table-column-properties fo:break-before="auto" style:column-width="1.699cm"/>
    </style:style>
    <style:style style:name="co11" style:family="table-column">
      <style:table-column-properties fo:break-before="auto" style:column-width="13.231cm"/>
    </style:style>
    <style:style style:name="co12"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071cm" fo:break-before="auto" style:use-optimal-row-height="false"/>
    </style:style>
    <style:style style:name="ro3" style:family="table-row">
      <style:table-row-properties style:row-height="1.614cm" fo:break-before="auto" style:use-optimal-row-height="false"/>
    </style:style>
    <style:style style:name="ro4" style:family="table-row">
      <style:table-row-properties style:row-height="2.071cm" fo:break-before="auto" style:use-optimal-row-height="false"/>
    </style:style>
    <style:style style:name="ro5"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style:vertical-align="middle"/>
      <style:paragraph-properties fo:text-align="start" fo:margin-left="0cm"/>
    </style:style>
    <style:style style:name="ce5" style:family="table-cell" style:parent-style-name="Default">
      <style:table-cell-properties fo:wrap-option="wrap" style:vertical-align="top"/>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no-wrap" style:vertical-align="automatic"/>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Segoe UI"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wrap-option="no-wrap" style:vertical-align="automatic"/>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vertical-align="to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Calibri" fo:font-size="12pt" style:font-name-asian="Calibri" style:font-name-complex="Calibri"/>
    </style:style>
    <style:style style:name="T2" style:family="text">
      <style:text-properties style:font-name="F" fo:font-size="12pt"/>
    </style:style>
    <style:style style:name="T3" style:family="text">
      <style:text-properties style:font-name="Calibri" fo:font-size="12pt" fo:font-weight="bold" style:font-name-asian="Calibri" style:font-name-complex="Calibri" style:font-weight-asian="bold" style:font-weight-complex="bold"/>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Sheet1" table:style-name="ta1">
        <office:forms form:automatic-focus="false" form:apply-design-mode="false"/>
        <table:shapes>
          <draw:frame draw:z-index="0" draw:name="https://r-xx.bstatic.com/xdata/images/xphoto/max1280x900/700033541.jpg?k=9acd6a61e97eaf942031ef891d25549c3386fcb67772c63ed29ef6125ce0f910&amp;o=" draw:style-name="gr1" draw:text-style-name="P1" svg:width="31.749cm" svg:height="23.812cm" svg:x="49.978cm" svg:y="37.077cm">
            <draw:image xlink:href="https://r-xx.bstatic.com/xdata/images/xphoto/max1280x900/700033541.jpg?k=9acd6a61e97eaf942031ef891d25549c3386fcb67772c63ed29ef6125ce0f910&amp;o=" xlink:type="simple" xlink:show="embed" xlink:actuate="onLoad" draw:mime-type="image/jpeg">
              <text:p/>
            </draw:image>
          </draw:frame>
          <draw:frame draw:z-index="1" draw:name="https://q-xx.bstatic.com/xdata/images/xphoto/max1280x900/700033543.jpg?k=6b7d3195e97e44603f06a7a1341381b47ac986ea1ca53dad9120fcf444c6d07b&amp;o=" draw:style-name="gr1" draw:text-style-name="P1" svg:width="31.749cm" svg:height="23.812cm" svg:x="81.728cm" svg:y="37.077cm">
            <draw:image xlink:href="https://q-xx.bstatic.com/xdata/images/xphoto/max1280x900/700033543.jpg?k=6b7d3195e97e44603f06a7a1341381b47ac986ea1ca53dad9120fcf444c6d07b&amp;o=" xlink:type="simple" xlink:show="embed" xlink:actuate="onLoad" draw:mime-type="image/jpeg">
              <text:p/>
            </draw:image>
          </draw:frame>
          <draw:frame draw:z-index="2" draw:name="https://q-xx.bstatic.com/xdata/images/xphoto/max1280x900/700033566.jpg?k=7462ae480b682fa287e6e0d469fb29eeb0dc16f56b37c1d6c65ac4945dd51e4d&amp;o=" draw:style-name="gr1" draw:text-style-name="P1" svg:width="17.858cm" svg:height="23.812cm" svg:x="113.478cm" svg:y="37.077cm">
            <draw:image xlink:href="https://q-xx.bstatic.com/xdata/images/xphoto/max1280x900/700033566.jpg?k=7462ae480b682fa287e6e0d469fb29eeb0dc16f56b37c1d6c65ac4945dd51e4d&amp;o=" xlink:type="simple" xlink:show="embed" xlink:actuate="onLoad" draw:mime-type="image/jpeg">
              <text:p/>
            </draw:image>
          </draw:frame>
          <draw:frame draw:z-index="3" draw:name="https://r-xx.bstatic.com/xdata/images/xphoto/max1280x900/698512218.jpg?k=86615a40070b53c39e119a422efc030f7d54b152602044cd5375ff125eb22bcd&amp;o=" draw:style-name="gr1" draw:text-style-name="P1" svg:width="31.749cm" svg:height="23.812cm" svg:x="63.869cm" svg:y="42.369cm">
            <draw:image xlink:href="https://r-xx.bstatic.com/xdata/images/xphoto/max1280x900/698512218.jpg?k=86615a40070b53c39e119a422efc030f7d54b152602044cd5375ff125eb22bcd&amp;o=" xlink:type="simple" xlink:show="embed" xlink:actuate="onLoad" draw:mime-type="image/jpeg">
              <text:p/>
            </draw:image>
          </draw:frame>
          <draw:frame draw:z-index="4" draw:name="https://q-xx.bstatic.com/xdata/images/xphoto/max1280x900/698512247.jpg?k=9b8090dceb59467ac692e39adf933e40d9fcc45b8987a632af49e3b8e0bb645f&amp;o=" draw:style-name="gr1" draw:text-style-name="P1" svg:width="31.749cm" svg:height="23.812cm" svg:x="95.619cm" svg:y="42.369cm">
            <draw:image xlink:href="https://q-xx.bstatic.com/xdata/images/xphoto/max1280x900/698512247.jpg?k=9b8090dceb59467ac692e39adf933e40d9fcc45b8987a632af49e3b8e0bb645f&amp;o=" xlink:type="simple" xlink:show="embed" xlink:actuate="onLoad" draw:mime-type="image/jpeg">
              <text:p/>
            </draw:image>
          </draw:frame>
          <draw:frame draw:z-index="5" draw:name="https://q-xx.bstatic.com/xdata/images/xphoto/max1280x900/698512311.jpg?k=27d40718b6df076ff453e75f4646752fc8c76b30b4c3cd31927eab0140dbcb5c&amp;o=" draw:style-name="gr1" draw:text-style-name="P1" svg:width="31.749cm" svg:height="23.812cm" svg:x="127.369cm" svg:y="42.369cm">
            <draw:image xlink:href="https://q-xx.bstatic.com/xdata/images/xphoto/max1280x900/698512311.jpg?k=27d40718b6df076ff453e75f4646752fc8c76b30b4c3cd31927eab0140dbcb5c&amp;o=" xlink:type="simple" xlink:show="embed" xlink:actuate="onLoad" draw:mime-type="image/jpeg">
              <text:p/>
            </draw:image>
          </draw:frame>
          <draw:frame draw:z-index="6" draw:name="https://r-xx.bstatic.com/xdata/images/xphoto/max1280x900/700033541.jpg?k=9acd6a61e97eaf942031ef891d25549c3386fcb67772c63ed29ef6125ce0f910&amp;o=" draw:style-name="gr1" draw:text-style-name="P1" svg:width="31.749cm" svg:height="23.812cm" svg:x="49.978cm" svg:y="34.96cm">
            <draw:image xlink:href="https://r-xx.bstatic.com/xdata/images/xphoto/max1280x900/700033541.jpg?k=9acd6a61e97eaf942031ef891d25549c3386fcb67772c63ed29ef6125ce0f910&amp;o=" xlink:type="simple" xlink:show="embed" xlink:actuate="onLoad" draw:mime-type="image/jpeg">
              <text:p/>
            </draw:image>
          </draw:frame>
          <draw:frame draw:z-index="7" draw:name="https://q-xx.bstatic.com/xdata/images/xphoto/max1280x900/700033543.jpg?k=6b7d3195e97e44603f06a7a1341381b47ac986ea1ca53dad9120fcf444c6d07b&amp;o=" draw:style-name="gr1" draw:text-style-name="P1" svg:width="31.749cm" svg:height="23.812cm" svg:x="81.728cm" svg:y="34.96cm">
            <draw:image xlink:href="https://q-xx.bstatic.com/xdata/images/xphoto/max1280x900/700033543.jpg?k=6b7d3195e97e44603f06a7a1341381b47ac986ea1ca53dad9120fcf444c6d07b&amp;o=" xlink:type="simple" xlink:show="embed" xlink:actuate="onLoad" draw:mime-type="image/jpeg">
              <text:p/>
            </draw:image>
          </draw:frame>
          <draw:frame draw:z-index="8" draw:name="https://q-xx.bstatic.com/xdata/images/xphoto/max1280x900/700033566.jpg?k=7462ae480b682fa287e6e0d469fb29eeb0dc16f56b37c1d6c65ac4945dd51e4d&amp;o=" draw:style-name="gr1" draw:text-style-name="P1" svg:width="17.858cm" svg:height="23.812cm" svg:x="113.478cm" svg:y="34.96cm">
            <draw:image xlink:href="https://q-xx.bstatic.com/xdata/images/xphoto/max1280x900/700033566.jpg?k=7462ae480b682fa287e6e0d469fb29eeb0dc16f56b37c1d6c65ac4945dd51e4d&amp;o=" xlink:type="simple" xlink:show="embed" xlink:actuate="onLoad" draw:mime-type="image/jpeg">
              <text:p/>
            </draw:image>
          </draw:frame>
          <draw:frame draw:z-index="9" draw:name="https://r-xx.bstatic.com/xdata/images/xphoto/max1280x900/698512218.jpg?k=86615a40070b53c39e119a422efc030f7d54b152602044cd5375ff125eb22bcd&amp;o=" draw:style-name="gr1" draw:text-style-name="P1" svg:width="31.749cm" svg:height="23.812cm" svg:x="63.869cm" svg:y="40.252cm">
            <draw:image xlink:href="https://r-xx.bstatic.com/xdata/images/xphoto/max1280x900/698512218.jpg?k=86615a40070b53c39e119a422efc030f7d54b152602044cd5375ff125eb22bcd&amp;o=" xlink:type="simple" xlink:show="embed" xlink:actuate="onLoad" draw:mime-type="image/jpeg">
              <text:p/>
            </draw:image>
          </draw:frame>
          <draw:frame draw:z-index="10" draw:name="https://q-xx.bstatic.com/xdata/images/xphoto/max1280x900/698512247.jpg?k=9b8090dceb59467ac692e39adf933e40d9fcc45b8987a632af49e3b8e0bb645f&amp;o=" draw:style-name="gr1" draw:text-style-name="P1" svg:width="31.749cm" svg:height="23.812cm" svg:x="95.619cm" svg:y="40.252cm">
            <draw:image xlink:href="https://q-xx.bstatic.com/xdata/images/xphoto/max1280x900/698512247.jpg?k=9b8090dceb59467ac692e39adf933e40d9fcc45b8987a632af49e3b8e0bb645f&amp;o=" xlink:type="simple" xlink:show="embed" xlink:actuate="onLoad" draw:mime-type="image/jpeg">
              <text:p/>
            </draw:image>
          </draw:frame>
          <draw:frame draw:z-index="11" draw:name="https://q-xx.bstatic.com/xdata/images/xphoto/max1280x900/698512311.jpg?k=27d40718b6df076ff453e75f4646752fc8c76b30b4c3cd31927eab0140dbcb5c&amp;o=" draw:style-name="gr1" draw:text-style-name="P1" svg:width="31.749cm" svg:height="23.812cm" svg:x="127.369cm" svg:y="40.252cm">
            <draw:image xlink:href="https://q-xx.bstatic.com/xdata/images/xphoto/max1280x900/698512311.jpg?k=27d40718b6df076ff453e75f4646752fc8c76b30b4c3cd31927eab0140dbcb5c&amp;o=" xlink:type="simple" xlink:show="embed" xlink:actuate="onLoad" draw:mime-type="image/jpeg">
              <text:p/>
            </draw:image>
          </draw:frame>
          <draw:frame draw:z-index="12" draw:name="https://r-xx.bstatic.com/xdata/images/xphoto/max1280x900/700033541.jpg?k=9acd6a61e97eaf942031ef891d25549c3386fcb67772c63ed29ef6125ce0f910&amp;o=" draw:style-name="gr1" draw:text-style-name="P1" svg:width="31.749cm" svg:height="23.812cm" svg:x="49.978cm" svg:y="34.96cm">
            <draw:image xlink:href="https://r-xx.bstatic.com/xdata/images/xphoto/max1280x900/700033541.jpg?k=9acd6a61e97eaf942031ef891d25549c3386fcb67772c63ed29ef6125ce0f910&amp;o=" xlink:type="simple" xlink:show="embed" xlink:actuate="onLoad" draw:mime-type="image/jpeg">
              <text:p/>
            </draw:image>
          </draw:frame>
          <draw:frame draw:z-index="13" draw:name="https://q-xx.bstatic.com/xdata/images/xphoto/max1280x900/700033543.jpg?k=6b7d3195e97e44603f06a7a1341381b47ac986ea1ca53dad9120fcf444c6d07b&amp;o=" draw:style-name="gr1" draw:text-style-name="P1" svg:width="31.749cm" svg:height="23.812cm" svg:x="81.728cm" svg:y="34.96cm">
            <draw:image xlink:href="https://q-xx.bstatic.com/xdata/images/xphoto/max1280x900/700033543.jpg?k=6b7d3195e97e44603f06a7a1341381b47ac986ea1ca53dad9120fcf444c6d07b&amp;o=" xlink:type="simple" xlink:show="embed" xlink:actuate="onLoad" draw:mime-type="image/jpeg">
              <text:p/>
            </draw:image>
          </draw:frame>
          <draw:frame draw:z-index="14" draw:name="https://q-xx.bstatic.com/xdata/images/xphoto/max1280x900/700033566.jpg?k=7462ae480b682fa287e6e0d469fb29eeb0dc16f56b37c1d6c65ac4945dd51e4d&amp;o=" draw:style-name="gr1" draw:text-style-name="P1" svg:width="17.858cm" svg:height="23.812cm" svg:x="113.478cm" svg:y="34.96cm">
            <draw:image xlink:href="https://q-xx.bstatic.com/xdata/images/xphoto/max1280x900/700033566.jpg?k=7462ae480b682fa287e6e0d469fb29eeb0dc16f56b37c1d6c65ac4945dd51e4d&amp;o=" xlink:type="simple" xlink:show="embed" xlink:actuate="onLoad" draw:mime-type="image/jpeg">
              <text:p/>
            </draw:image>
          </draw:frame>
          <draw:frame draw:z-index="15" draw:name="https://r-xx.bstatic.com/xdata/images/xphoto/max1280x900/698512218.jpg?k=86615a40070b53c39e119a422efc030f7d54b152602044cd5375ff125eb22bcd&amp;o=" draw:style-name="gr1" draw:text-style-name="P1" svg:width="31.749cm" svg:height="23.812cm" svg:x="63.869cm" svg:y="40.252cm">
            <draw:image xlink:href="https://r-xx.bstatic.com/xdata/images/xphoto/max1280x900/698512218.jpg?k=86615a40070b53c39e119a422efc030f7d54b152602044cd5375ff125eb22bcd&amp;o=" xlink:type="simple" xlink:show="embed" xlink:actuate="onLoad" draw:mime-type="image/jpeg">
              <text:p/>
            </draw:image>
          </draw:frame>
          <draw:frame draw:z-index="16" draw:name="https://q-xx.bstatic.com/xdata/images/xphoto/max1280x900/698512247.jpg?k=9b8090dceb59467ac692e39adf933e40d9fcc45b8987a632af49e3b8e0bb645f&amp;o=" draw:style-name="gr1" draw:text-style-name="P1" svg:width="31.749cm" svg:height="23.812cm" svg:x="95.619cm" svg:y="40.252cm">
            <draw:image xlink:href="https://q-xx.bstatic.com/xdata/images/xphoto/max1280x900/698512247.jpg?k=9b8090dceb59467ac692e39adf933e40d9fcc45b8987a632af49e3b8e0bb645f&amp;o=" xlink:type="simple" xlink:show="embed" xlink:actuate="onLoad" draw:mime-type="image/jpeg">
              <text:p/>
            </draw:image>
          </draw:frame>
          <draw:frame draw:z-index="17" draw:name="https://q-xx.bstatic.com/xdata/images/xphoto/max1280x900/698512311.jpg?k=27d40718b6df076ff453e75f4646752fc8c76b30b4c3cd31927eab0140dbcb5c&amp;o=" draw:style-name="gr1" draw:text-style-name="P1" svg:width="31.749cm" svg:height="23.812cm" svg:x="127.369cm" svg:y="40.252cm">
            <draw:image xlink:href="https://q-xx.bstatic.com/xdata/images/xphoto/max1280x900/698512311.jpg?k=27d40718b6df076ff453e75f4646752fc8c76b30b4c3cd31927eab0140dbcb5c&amp;o=" xlink:type="simple" xlink:show="embed" xlink:actuate="onLoad" draw:mime-type="image/jpe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4" table:default-cell-style-name="Default"/>
        <table:table-column table:style-name="co10" table:number-columns-repeated="16371"/>
        <table:table-row table:style-name="ro1">
          <table:table-cell table:style-name="ce1" office:value-type="string" calcext:value-type="string">
            <text:p>Nom de l'hôtel</text:p>
          </table:table-cell>
          <table:table-cell table:style-name="ce1" office:value-type="string" calcext:value-type="string">
            <text:p>Lien officiel</text:p>
          </table:table-cell>
          <table:table-cell table:style-name="ce1" office:value-type="string" calcext:value-type="string">
            <text:p>Equipements</text:p>
          </table:table-cell>
          <table:table-cell table:style-name="ce1" office:value-type="string" calcext:value-type="string">
            <text:p>Lien image</text:p>
          </table:table-cell>
          <table:table-cell table:style-name="ce1" office:value-type="string" calcext:value-type="string">
            <text:p>Description</text:p>
          </table:table-cell>
          <table:table-cell table:style-name="ce1" office:value-type="string" calcext:value-type="string">
            <text:p>Avis brut</text:p>
          </table:table-cell>
          <table:table-cell table:style-name="ce1" office:value-type="string" calcext:value-type="string">
            <text:p>Points positifs</text:p>
          </table:table-cell>
          <table:table-cell table:style-name="ce1" office:value-type="string" calcext:value-type="string">
            <text:p>Pointsnegatifs</text:p>
          </table:table-cell>
          <table:table-cell table:style-name="ce1" office:value-type="string" calcext:value-type="string">
            <text:p>Avis (x/10)</text:p>
          </table:table-cell>
          <table:table-cell table:number-columns-repeated="4"/>
          <table:table-cell table:style-name="Default" table:number-columns-repeated="16371"/>
        </table:table-row>
        <table:table-row table:style-name="ro2">
          <table:table-cell table:style-name="ce2" office:value-type="string" calcext:value-type="string">
            <text:p>Hotel Al Jazira Beach &amp; Spa - All Inclusive - Families and Couples Only</text:p>
          </table:table-cell>
          <table:table-cell/>
          <table:table-cell table:style-name="ce5" office:value-type="string" calcext:value-type="string">
            <text:p>3 piscines Connexion Wi-Fi gratuite Spa et centre de bien-être Restaurant En bord de plage Parking gratuit Chambres familiales Bar Plage privée Très bon petit-déjeuner Très bon petit-déjeuner Salle de bains Papier toilette Serviettes Salle de bains privative Toilettes Chambre Linge de maison Armoire ou penderie En extérieur Mobilier extérieur En bord de plage Terrasse bien exposée Plage privée Terrasse Jardin Activités Aérobic Plage Animations en soirée Discothèque/DJ Équipe d'animation ÉquitationEn supplémentEn dehors de l'établissement Canoë-kayak Planche à voileEn supplément Parcours de golf (à moins de 3 km)En supplément High-tech Télévision à écran plat Téléphone Télévision Restauration Café sur place Snack-bar Bar Restaurant InternetUne connexion Wi-Fi est disponible dans les parties communes gratuitement. ParkingUn parking gratuit et privé est disponible sur place (sans possibilité de réserver). Services Service de ménage quotidien Bagagerie Service de change Réception ouverte 24h/24 Pour les familles Club pour enfants Chambres familiales Jeux de plein air pour enfants Aire de jeux pour enfants Sécurité Extincteurs Détecteurs de fumée Alarme de sécurité Clés d'accès Sécurité 24h/24 Coffre-fortEn supplément Général Espace fumeurs Chauffage Climatisation 3 piscines Piscine 1 - ExtérieureGratuit ! En saison Tous les âges sont les bienvenus Bar dans la piscine Chaises longues ou de plage Parasols Piscine 2 - IntérieureGratuit ! En saison Tous les âges sont les bienvenus Chaises longues ou de plage Piscine 3 - ExtérieureGratuit ! En saison Tous les âges sont les bienvenus Espace peu profond Bar dans la piscine Chaises longues ou de plage Bien-être Forfaits spa/bien-être Spa Services beauté Parasols Chaises longues ou de plage Hammam Massages Spa et centre de bien-êtreEn supplément Langues parlées Arabe Allemand Anglais Français</text:p>
          </table:table-cell>
          <table:table-cell office:value-type="string" calcext:value-type="string">
            <text:p>https://cf.bstatic.com/xdata/images/hotel/max1024x768/445600411.jpg?k=45df6acf73eea64ab09fc1a5070fe8d59383fffc6901426ddfd5f911990c38c9&amp;o=</text:p>
          </table:table-cell>
          <table:table-cell table:style-name="ce9" office:value-type="string" calcext:value-type="string">
            <text:p>L’établissement Al Jazira Beach &amp; Spa- All Inclusive - Families and Couples Only se trouve à Houmt Souk, à quelques pas de ce lieu d’intérêt : Plage de Mezraia. Il propose une piscine extérieure ouverte en saison, un jardin, une plage privée et un parking privé gratuit. Cet hôtel 3 étoiles propose une terrasse ainsi que des hébergements dotés de la climatisation, d’une connexion Wi-Fi gratuite et d’une salle de bains privative. Cet hôtel possède une piscine intérieure, un hammam, des animations en soirée et un club pour enfants. </text:p>
          </table:table-cell>
          <table:table-cell table:style-name="ce6" office:value-type="string" calcext:value-type="string">
            <text:p>Commentaire envoyé le 16 juillet 2026                    <text:span text:style-name="T1">Beau séjour à l’hôtel</text:span></text:p>
            <text:p><text:span text:style-name="T1">Avec une note de 1010Très bien ainsi que l animation au top .Manque nettoyer le bord de plage et plus de chaises longue avec parasol .UtilePas utile</text:span></text:p>
            <text:p><text:span text:style-name="T1"/></text:p>
            <text:p><text:span text:style-name="T1">ChristineActif depuis 2013Suisse</text:span></text:p>
            <text:p><text:span text:style-name="T1">Chambre Familiale - Vue sur Mer</text:span></text:p>
            <text:p><text:span text:style-name="T1">1 nuit · juin 2026</text:span></text:p>
            <text:p><text:span text:style-name="T1">Voyageur individuel</text:span></text:p>
            <text:p><text:span text:style-name="T1">Commentaire envoyé le 14 juillet 2026</text:span></text:p>
            <text:p><text:span text:style-name="T1">Fabuleux </text:span></text:p>
            <text:p><text:span text:style-name="T1">Avec une note de 9,09,0Magnifique hôtel très bien situe, avec des bungalows tout confort. Belle plage très propre. Personnel sympathique.</text:span></text:p>
            <text:p><text:span text:style-name="T3">Réponse de l'hôtel :</text:span></text:p>
            <text:p><text:span text:style-name="T1">Thank you for your wonderful review and for sharing your...Lire la suiteUtilePas utile</text:span></text:p>
            <text:p><text:span text:style-name="T1"/></text:p>
            <text:p><text:span text:style-name="T1">CamilleActif depuis 2023France</text:span></text:p>
            <text:p><text:span text:style-name="T1">Chambre Double ou Lits Jumeaux Standard</text:span></text:p>
            <text:p><text:span text:style-name="T1">7 nuits · juillet 2026</text:span></text:p>
            <text:p><text:span text:style-name="T1">Voyageur individuel</text:span></text:p>
            <text:p><text:span text:style-name="T1">Commentaire envoyé le 13 juillet 2026</text:span></text:p>
            <text:p><text:span text:style-name="T1">Au top</text:span></text:p>
            <text:p><text:span text:style-name="T1">Avec une note de 8,08,0Hôtel est bien placé, la plage qui est direct. Le personnel très serviable et gentil. Animations tout le long de la journée. Activités nautiques avec Maxime au top du topLe buffet est un peu répétitif mais dans l'ensemble cela reste correct</text:span></text:p>
            <text:p><text:span text:style-name="T3">Réponse de l'hôtel :</text:span></text:p>
            <text:p><text:span text:style-name="T1">Here's a polished response you can use: Thank you...Lire la suiteUtilePas utile</text:span></text:p>
            <text:p><text:span text:style-name="T1"/></text:p>
            <text:p><text:span text:style-name="T1">LindaActif depuis 2021France</text:span></text:p>
            <text:p><text:span text:style-name="T1">Chambre Triple Standard</text:span></text:p>
            <text:p><text:span text:style-name="T1">6 nuits · juillet 2026</text:span></text:p>
            <text:p><text:span text:style-name="T1">Voyageur individuel</text:span></text:p>
            <text:p><text:span text:style-name="T1">Commentaire envoyé le 12 juillet 2026</text:span></text:p>
            <text:p><text:span text:style-name="T1">Djerba</text:span></text:p>
            <text:p><text:span text:style-name="T1">Avec une note de 8,08,0Les locaux, l'emplacement, le personnel, les animations, les boissons inclus non stop 24/24 en all in clusive. La literie, la clim.Les femmes de ménage si elles ne font pas les chambres au moment de leur tour parce que vous mettez la pancarte pas disponible. Elles oublient de repasser et la chambre reste comme elle est sans serviette de rechange. Le repas bien mais manque de choix dans les glaces et les dessert.</text:span></text:p>
            <text:p><text:span text:style-name="T3">Réponse de l'hôtel :</text:span></text:p>
            <text:p><text:span text:style-name="T1">Thank you for taking the time to share your feedback. We...Lire la suiteUtilePas utile</text:span></text:p>
            <text:p><text:span text:style-name="T1"/></text:p>
            <text:p><text:span text:style-name="T1">FFatimaFrance</text:span></text:p>
            <text:p><text:span text:style-name="T1">Chambre Triple Standard</text:span></text:p>
            <text:p><text:span text:style-name="T1">5 nuits · juillet 2026</text:span></text:p>
            <text:p><text:span text:style-name="T1">Voyageur individuel</text:span></text:p>
            <text:p><text:span text:style-name="T1">Commentaire envoyé le 6 juillet 2026</text:span></text:p>
            <text:p><text:span text:style-name="T1">Exceptionnel</text:span></text:p>
            <text:p><text:span text:style-name="T1">Avec une note de 1010ToutRien</text:span></text:p>
            <text:p><text:span text:style-name="T3">Réponse de l'hôtel :</text:span></text:p>
            <text:p><text:span text:style-name="T1">Thank you for your perfect review! We’re delighted to...Lire la suiteUtilePas utile</text:span></text:p>
            <text:p><text:span text:style-name="T1"/></text:p>
            <text:p><text:span text:style-name="T1">HeleneActif depuis 2013France</text:span></text:p>
            <text:p><text:span text:style-name="T1">Chambre Simple Standard</text:span></text:p>
            <text:p><text:span text:style-name="T1">1 nuit · avril 2026</text:span></text:p>
            <text:p><text:span text:style-name="T1">Voyageur individuel</text:span></text:p>
            <text:p><text:span text:style-name="T1">Commentaire envoyé le 1er juillet 2026</text:span></text:p>
            <text:p><text:span text:style-name="T1">Parfait</text:span></text:p>
            <text:p><text:span text:style-name="T1">Avec une note de 1010Tout était parfait . Chambres neuves et très spatieuses . Personnel adorable et aux petits soins . Buffets très bons .Rien</text:span></text:p>
            <text:p><text:span text:style-name="T3">Réponse de l'hôtel :</text:span></text:p>
            <text:p><text:span text:style-name="T1">Thank you for your perfect review! We’re delighted to...Lire la suiteUtilePas utile</text:span></text:p>
            <text:p><text:span text:style-name="T1"/></text:p>
            <text:p><text:span text:style-name="T1">HeleneActif depuis 2013France</text:span></text:p>
            <text:p><text:span text:style-name="T1">Chambre Simple Standard</text:span></text:p>
            <text:p><text:span text:style-name="T1">2 nuits · avril 2026</text:span></text:p>
            <text:p><text:span text:style-name="T1">Voyageur individuel</text:span></text:p>
            <text:p><text:span text:style-name="T1">Commentaire envoyé le 1er juillet 2026</text:span></text:p>
            <text:p><text:span text:style-name="T1">Inespéré</text:span></text:p>
            <text:p><text:span text:style-name="T1">Avec une note de 1010Nous avions une chambre neuve , avec terrasse vue mer . Grande chambre , avec bonne literie , plus 2 canapés . Terrasse avec tables et chaisesRien</text:span></text:p>
            <text:p><text:span text:style-name="T3">Réponse de l'hôtel :</text:span></text:p>
            <text:p><text:span text:style-name="T1">Thank you for your wonderful 10/10 review! We're...Lire la suite1 personne a trouvé ce commentaire utile.UtilePas utile</text:span></text:p>
            <text:p><text:span text:style-name="T1"/></text:p>
            <text:p><text:span text:style-name="T1">AudreyActif depuis 2014France</text:span></text:p>
            <text:p><text:span text:style-name="T1">Chambre Double ou Lits Jumeaux Standard</text:span></text:p>
            <text:p><text:span text:style-name="T1">8 nuits · juin 2026</text:span></text:p>
            <text:p><text:span text:style-name="T1">Voyageur individuel</text:span></text:p>
            <text:p><text:span text:style-name="T1">Commentaire envoyé le 28 juin 2026</text:span></text:p>
            <text:p><text:span text:style-name="T1">Exceptionnel</text:span></text:p>
            <text:p><text:span text:style-name="T1">Avec une note de 1010Tres bon accueil, localisation, restaurants, animation</text:span></text:p>
            <text:p><text:span text:style-name="T3">Réponse de l'hôtel :</text:span></text:p>
            <text:p><text:span text:style-name="T1">Thank you so much for your fantastic 10/10...Lire la suiteUtilePas utile</text:span></text:p>
            <text:p><text:span text:style-name="T1"/></text:p>
            <text:p><text:span text:style-name="T1">FlavieActif depuis 2022France</text:span></text:p>
            <text:p><text:span text:style-name="T1">Chambre Double ou Lits Jumeaux - Vue sur Mer</text:span></text:p>
            <text:p><text:span text:style-name="T1">11 nuits · juin 2026</text:span></text:p>
            <text:p><text:span text:style-name="T1">Couple</text:span></text:p>
            <text:p><text:span text:style-name="T1">Commentaire envoyé le 24 juin 2026</text:span></text:p>
            <text:p><text:span text:style-name="T1">Nous repartons avec de merveilleux souvenirs et reviendrons avec grand plaisir !</text:span></text:p>
            <text:p><text:span text:style-name="T1">Avec une note de 1010Séjour exceptionnel du début à la fin ! Les animateurs sont incroyables : dynamiques, souriants et toujours de bonne humeur, ce qui crée une ambiance chaleureuse et conviviale dans tout l’hôtel. Les piscines sont magnifiques, très bien entretenues et adaptées à tous les goûts. Les repas sont variés, de qualité et permettent de découvrir la gastronomie locale à travers de nombreuses spécialités tunisiennes. Les activités proposées mettent également en valeur les traditions locales, ce qui apporte une vraie dimension culturelle au séjour. Les activités sportives sont nombreuses, bien organisées et animées avec enthousiasme. La plage est agréable. Un grand bravo également à tout le personnel, toujours accueillant, professionnel, attentionné et prêt à rendre service avec le sourire. La chambre était propre, confortable et bien entretenue tout au long du séjour. Un hôtel où l’on se sent véritablement bien, idéal pour se détendre, s’amuser et découvrir la culture locale. Nous repartons avec de merveilleux souvenirs et reviendrons avec grand plaisir ! ⭐⭐⭐⭐⭐Comme dans tous les hôtels, les clients réservent les transats, mais la direction fait de son mieux pour éviter ça</text:span></text:p>
            <text:p><text:span text:style-name="T3">Réponse de l'hôtel :</text:span></text:p>
            <text:p><text:span text:style-name="T1">Thank you so much for your wonderful and detailed review...Lire la suiteUtilePas utile</text:span></text:p>
            <text:p><text:span text:style-name="T1"/></text:p>
            <text:p><text:span text:style-name="T1">PascaleActif depuis 2011France</text:span></text:p>
            <text:p><text:span text:style-name="T1">Chambre Double ou Lits Jumeaux Standard</text:span></text:p>
            <text:p><text:span text:style-name="T1">9 nuits · juin 2026</text:span></text:p>
            <text:p><text:span text:style-name="T1">Groupe</text:span></text:p>
            <text:p><text:span text:style-name="T1">Commentaire envoyé le 21 juin 2026</text:span></text:p>
            <text:p><text:span text:style-name="T1">Excellent rapport qualité prix</text:span></text:p>
            <text:p><text:span text:style-name="T1">Avec une note de 8,08,0L’accueil, la propreté, l’emplacement et le professionnalisme dans tous les servicesCourt épisode d’une fuite d’eau dans XV très vite réglé </text:span></text:p>
            <text:p><text:span text:style-name="T2"/></text:p>
          </table:table-cell>
          <table:table-cell table:number-columns-repeated="2"/>
          <table:table-cell office:value-type="float" office:value="8" calcext:value-type="float">
            <text:p>8</text:p>
          </table:table-cell>
          <table:table-cell table:number-columns-repeated="4"/>
          <table:table-cell table:style-name="Default" table:number-columns-repeated="16371"/>
        </table:table-row>
        <table:table-row table:style-name="ro3">
          <table:table-cell table:style-name="ce3" office:value-type="string" calcext:value-type="string">
            <text:p>Hotel Aldiana Djerba Atlantide</text:p>
          </table:table-cell>
          <table:table-cell/>
          <table:table-cell table:style-name="ce6" office:value-type="string" calcext:value-type="string">
            <text:p>Wi-Fi (hall) <text:span text:style-name="T1">Piscine</text:span></text:p>
            <text:p><text:span text:style-name="T1">Spa</text:span></text:p>
            <text:p><text:span text:style-name="T1">Parking</text:span></text:p>
            <text:p><text:span text:style-name="T1">Climatisation</text:span></text:p>
            <text:p><text:span text:style-name="T1">Restaurant</text:span></text:p>
            <text:p><text:span text:style-name="T1">Bar dans l'hôtel</text:span></text:p>
            <text:p><text:span text:style-name="T1">Salle de fitness</text:span></text:p>
            <text:p><text:span text:style-name="T2"/></text:p>
          </table:table-cell>
          <table:table-cell office:value-type="string" calcext:value-type="string">
            <text:p>https://imgcy.trivago.com/c_limit,d_dummy.jpeg,f_auto,h_1020,q_auto,w_2000/hotelier-images/5c/ca/ebf1552279507453470b76cf564c9a587977c6933a1425217ecbab3d6a7a.jpeg</text:p>
          </table:table-cell>
          <table:table-cell table:style-name="ce6" office:value-type="string" calcext:value-type="string">
            <text:p>Des Moments Magnifiques au Golf de Gabès ! L’Aldiana Djerba Atlantide est construit dans le style typiquement maure. Le Club avec une surface de 146.000 m² est située directement à la plage étendue. Le Club offre aux clients des nombreuses activités sportifs ou simplement la relaxation au soleil. A part des 12 terrains de tennis (sable) avec un center-court dans le club, il existe aussi un terrain de Golf avec 27 trous uniquement un kilomètre du club. Sur ce terrain aussi des joueurs sans carte verte sont permis. Pour des amis du sport nautique l’Aldiana Djerba Atlantide offre des conditions idéales pour faire la voile, la planche à voile ou bien le « Kitesurf ». Les cours de Kitesurf offrent beaucoup de plaisir avec des parcours à travers le vent et des sautes immenses. En plus des semaines de Kitesurf avec Jens Siegert, un spécialiste de la première heure et un professeur de Kitesurf selon VDWS seront offerts. La fascination ainsi que des sentiments de bonheur sont garantis.Par ailleurs, il existe aussi un grand choix de sport fun comme faire le patins à roulette, le tire à l’arc, le beach-volley, etc. Le centre wellness est complètement destiné pour la relaxation et le repos. Des applications nombreuses réconcilient l’équilibre corporelle et psychique. Les beaux-arts, le sauna, le hammam ainsi que un secteur de repos généreux invitent les clients s’arrêter. Les clients se relaxent aussi à la plage propre du club sous le soleil tunisien avec un vu mer fantastique. De passer ses vacances dans un Aldiana c’est plus qu’une pause. C’est une joie de vivre positive. Des clients rencontrent des personnes qui partagent les mêmes intérêts au sport, au wellness, auprès les repas délicieux, un vers de vin ou bien d’un cocktail au bar le soir. Et cela ne peut être plus agréable que sous le soleil de la Tunisie ! </text:p>
          </table:table-cell>
          <table:table-cell table:style-name="ce6" office:value-type="string" calcext:value-type="string">
            <text:p>8,9Excellentsur la base de 4 659 évaluations provenant de sites réputés <text:span text:style-name="T3">Synthèse des avis</text:span></text:p>
            <text:p><text:span text:style-name="T1">Contenu résumé à l’aide de l’IA sur la base de 100+ avis voyageurs · Dernière mise à jour : 29 May 2026</text:span></text:p>
            <text:p><text:span text:style-name="T1">Cet hôtel offre une ambiance de club animée, idéale pour les familles, les couples et les groupes d'amis en quête d'une escapade divertissante et pleine de bonne humeur. L'établissement bénéficie d'un emplacement stratégique avec un accès pratique aux attractions et commodités à proximité. Les clients peuvent profiter des piscines exceptionnellement propres, y compris une piscine dédiée au mini-club pour les bébés. Le personnel, en particulier l'équipe d'animation, est constamment félicité pour son service attentionné et professionnel, qui complète les offres culinaires variées et savoureuses. Pour une expérience vraiment immersive, ne manquez pas les spectacles en soirée très professionnels et variés.</text:span></text:p>
            <text:p><text:span text:style-name="T1">Services et équipements</text:span></text:p>
            <text:p><text:span text:style-name="T1">Au-delà des offres classiques, l'hôtel propose une gamme d'installations, bien que certains espaces affichent un charme désuet. Les piscines sont constamment remarquées pour leur propreté, avec un mini-club dédié comprenant une agréable piscine pour bébés. Bien que les équipements de fitness soient décrits comme plus anciens, ils restent fonctionnels pour les clients. La plage est un atout majeur, louée pour sa beauté et son abondance de chaises longues et de parasols, même si certains mentionnent la nécessité de remplacer les matelas. En revanche, la connexion Wi-Fi est souvent citée comme lente et non universellement disponible, et la propreté des tables dans l'espace club pourrait être améliorée.</text:span></text:p>
            <text:p><text:span text:style-name="T1">Confort des chambres</text:span></text:p>
            <text:p><text:span text:style-name="T1">Si certains clients ont trouvé les chambres propres, spacieuses et confortables, avec des vues agréables, d'autres ont rencontré des problèmes importants. Parmi les préoccupations soulevées, on peut citer de fortes odeurs d'égout à l'arrivée, ayant nécessité des changements de chambre, et le sentiment général que les hébergements étaient vieillots et nécessitaient une rénovation. Plusieurs rapports ont fait état de problèmes de climatisation défectueuse, de matelas durs et inconfortables, et même de cas de vermine, en particulier des cafards, dans plusieurs chambres et salles de bains. De plus, la description de l'hôtel comme proposant des "bungalows" était trompeuse, car de nombreux clients ont été logés dans des bâtiments à plusieurs étages, ce qui a entraîné des nuisances sonores provenant des chambres voisines.</text:span></text:p>
            <text:p><text:span text:style-name="T1">Nourriture et boissons</text:span></text:p>
            <text:p><text:span text:style-name="T1">Au-delà des offres habituelles, l'expérience culinaire de l'hôtel est constamment saluée, les clients soulignant fréquemment la qualité exceptionnelle et la diversité des choix disponibles. Les restaurants proposent quotidiennement un très large éventail de plats, garantissant une cuisine particulièrement bonne qui répond à tous les goûts. Bien que les salles à manger principales soient bien entretenues et que la nourriture soit décrite comme très savoureuse, certains commentaires suggèrent que le restaurant de plage pourrait bénéficier de plus de variété. Le buffet du petit-déjeuner est réputé pour ses options vastes et variées, et l'expérience culinaire globale, y compris les collations, est souvent décrite comme délicieuse et satisfaisante.</text:span></text:p>
            <text:p><text:span text:style-name="T1">Personnel et service</text:span></text:p>
            <text:p><text:span text:style-name="T1">Les clients ne tarissent pas d'éloges sur le personnel attentionné et professionnel, soulignant son dévouement au bien-être des clients. L'équipe de la réception est souvent félicitée pour son accueil chaleureux et sa réactivité, même si quelques rares signalements font état de cas isolés de personnes peu serviables. Dans tout l'établissement, le service est fréquemment décrit comme excellent, beaucoup notant les sourires constants et la serviabilité de l'équipe. Bien que certains clients aient rencontré des serveurs débordés pendant les heures de pointe, le sentiment général indique une équipe très dévouée et amicale, en particulier l'équipe d'animation, qui est louée pour son approche engageante et dynamique.</text:span></text:p>
            <text:p><text:span text:style-name="T1">Informations supplémentaires</text:span></text:p>
            <text:p><text:span text:style-name="T1">Au-delà des prestations classiques, l'hôtel se distingue souvent par son ambiance club, qui convient aussi bien aux célibataires qu'aux couples, aux groupes d'amis et aux familles. Les clients apprécient l'organisation fluide des arrivées et des départs, incluant un accueil personnalisé à l'aéroport et des transferts directs en bus. Bien que le système général soit jugé quelque peu daté, les spectacles en soirée sont constamment salués pour leur mise en scène professionnelle, leur variété et leur valeur de divertissement. Cependant, certains clients expriment leur déception quant au manque de charme tunisien authentique, trouvant l'atmosphère principalement orientée vers une clientèle allemande. De plus, les pratiques de l'hôtel en matière de développement durable sont un sujet de préoccupation, notamment l'utilisation excessive de bouteilles en plastique de 0,33 litre au lieu d'options réutilisables.</text:span></text:p>
            <text:p><text:span text:style-name="T2"/></text:p>
          </table:table-cell>
          <table:table-cell table:number-columns-repeated="2"/>
          <table:table-cell office:value-type="string" calcext:value-type="string">
            <text:p>8.9</text:p>
          </table:table-cell>
          <table:table-cell table:number-columns-repeated="4"/>
          <table:table-cell table:style-name="Default" table:number-columns-repeated="16371"/>
        </table:table-row>
        <table:table-row table:style-name="ro4">
          <table:table-cell table:style-name="ce4" office:value-type="string" calcext:value-type="string">
            <text:p>Hotel Arisha</text:p>
          </table:table-cell>
          <table:table-cell table:number-columns-repeated="3"/>
          <table:table-cell table:style-name="ce6" office:value-type="string" calcext:value-type="string">
            <text:p>Situé à Houmt Souk, l’établissement hotel arisha possède un jardin, une terrasse, un restaurant et un bar. Disposant d’une connexion Wi-Fi gratuite, cet hôtel est à respectivement 18 km et 21 km environ de : Parcours de golf Djerba Golf Club et Lalla Hadria Museum. Vous pourrez profiter d'un service d'étage, d'une réception ouverte 24h/24 et d'un service de change. Les hébergements comprennent un patio offrant une vue sur le jardin. Les hébergements disposent d’une salle de bains privative dotée d’une douche et d'articles de toilette gratuits. Ils offrent également une vue sur la piscine. Vous profiterez de la climatisation et d'une télévision à écran plat. Vous séjournerez à respectivement 21 km et 21 km de ces lieux d’intérêt : Djerba Explore Park et Crocodile Farm. L'aéroport le plus proche (Aéroport international de Djerba-Zarzis) est à 7 km. </text:p>
          </table:table-cell>
          <table:table-cell table:style-name="ce6" office:value-type="string" calcext:value-type="string">
            <text:p>Sans doute le meilleur endroit pour une nuit ou deux au coeur de Houmt Souk.<text:span text:style-name="T1">Avec une note de 8,08,0Très bel endroit historique au coeur de Hoult Souk, dans une rue tranquille. Beaucoup de charme. Grande chambre donnant sur le calme du patio.Petit déjeuner un peu basique. La wifi ne répond pas trop bien à certains endroits ou certains moments.UtilePas utile</text:span></text:p>
            <text:p><text:span text:style-name="T1"/></text:p>
            <text:p><text:span text:style-name="T1">VeroniqueActif depuis 2021France</text:span></text:p>
            <text:p><text:span text:style-name="T1">Chambre Double avec Salle de Bains Privative</text:span></text:p>
            <text:p><text:span text:style-name="T1">1 nuit · septembre 2025</text:span></text:p>
            <text:p><text:span text:style-name="T1">Voyageur individuel</text:span></text:p>
            <text:p><text:span text:style-name="T1">Commentaire envoyé le 3 octobre 2025</text:span></text:p>
            <text:p><text:span text:style-name="T1">Très bien !!</text:span></text:p>
            <text:p><text:span text:style-name="T1">Avec une note de 8,08,0Très bonne situation. Personnel disponible et réactif. Ambiance soir sympa. Possibilité de se restaurer.Le bruit du fait du bar resto au dessous des chambres mais jusqu'à 23h donc il faut juste le savoir.UtilePas utile</text:span></text:p>
            <text:p><text:span text:style-name="T1"/></text:p>
            <text:p><text:span text:style-name="T1">AminaActif depuis 2024France</text:span></text:p>
            <text:p><text:span text:style-name="T1">Chambre Double avec Salle de Bains Privative</text:span></text:p>
            <text:p><text:span text:style-name="T1">1 nuit · septembre 2024</text:span></text:p>
            <text:p><text:span text:style-name="T1">Voyageur individuel</text:span></text:p>
            <text:p><text:span text:style-name="T1">Commentaire envoyé le 27 septembre 2024</text:span></text:p>
            <text:p><text:span text:style-name="T1">Belle experience</text:span></text:p>
            <text:p><text:span text:style-name="T1">Avec une note de 8,08,0C'est un lieux avec une architecture authentique, un style djerbien traditionnel mélangé au moderne. Proximité à houmt essouq et à l'aéroport .C'est très bruyant le soir, sa se comprend au vu de l'activité tardive du restau bar au RDC, sa ne pas trop dérangé, car j'y été en connaissance de cause ( c'est pour ça que j'avais réservé qu'une nuit )UtilePas utile</text:span></text:p>
            <text:p><text:span text:style-name="T1"/></text:p>
            <text:p><text:span text:style-name="T1">MurielActif depuis 2023France</text:span></text:p>
            <text:p><text:span text:style-name="T1">Chambre Double avec Salle de Bains Privative</text:span></text:p>
            <text:p><text:span text:style-name="T1">3 nuits · juin 2023</text:span></text:p>
            <text:p><text:span text:style-name="T1">Voyageur individuel</text:span></text:p>
            <text:p><text:span text:style-name="T1">Commentaire envoyé le 18 juillet 2023</text:span></text:p>
            <text:p><text:span text:style-name="T1">séjour comme dans un rêve éveillé</text:span></text:p>
            <text:p><text:span text:style-name="T1">Avec une note de 8,08,0le personnel très avenant et très sympa hôtel étonnant par son décor uniquebruit de la rueUtilePas utile</text:span></text:p>
            <text:p><text:span text:style-name="T1"/></text:p>
            <text:p><text:span text:style-name="T1">Marie-pierreActif depuis 2015France</text:span></text:p>
            <text:p><text:span text:style-name="T1">Chambre Double avec Salle de Bains Privative</text:span></text:p>
            <text:p><text:span text:style-name="T1">1 nuit · février 2026</text:span></text:p>
            <text:p><text:span text:style-name="T1">Voyageur individuel</text:span></text:p>
            <text:p><text:span text:style-name="T1">Commentaire envoyé le 10 février 2026</text:span></text:p>
            <text:p><text:span text:style-name="T1">Pour moi , parfait .</text:span></text:p>
            <text:p><text:span text:style-name="T1">Avec une note de 1010J'ai beaucoup aimé le cachet ancien de la chambre et l'ensemble du bàtiment en coursives avec sa piscine au milieu . Le petit déjeuner ne satisfera pas les amateurs de gros petit déj continental mais il a répondu à mes besoins (1 oeuf!) ; personnel très accueillant , essayant de répondre à mes questions et attentesUtilePas utile</text:span></text:p>
            <text:p><text:span text:style-name="T1"/></text:p>
            <text:p><text:span text:style-name="T1">GuillaumeActif depuis 2020France</text:span></text:p>
            <text:p><text:span text:style-name="T1">Chambre Double avec Salle de Bains Privative</text:span></text:p>
            <text:p><text:span text:style-name="T1">4 nuits · août 2023</text:span></text:p>
            <text:p><text:span text:style-name="T1">Voyageur individuel</text:span></text:p>
            <text:p><text:span text:style-name="T1">Commentaire envoyé le 18 août 2023</text:span></text:p>
            <text:p><text:span text:style-name="T1">Un séjour merveilleux à l’hôtel Arischa !!!</text:span></text:p>
            <text:p><text:span text:style-name="T1">Avec une note de 1010L’accueil est exceptionnel, le funduck est splendide et l’emplacement extraordinaire !UtilePas utile</text:span></text:p>
            <text:p><text:span text:style-name="T1"/></text:p>
            <text:p><text:span text:style-name="T1">SorayaActif depuis 2015France</text:span></text:p>
            <text:p><text:span text:style-name="T1">Chambre Double avec Salle de Bains Privative</text:span></text:p>
            <text:p><text:span text:style-name="T1">2 nuits · décembre 2023</text:span></text:p>
            <text:p><text:span text:style-name="T1">Voyageur individuel</text:span></text:p>
            <text:p><text:span text:style-name="T1">Commentaire envoyé le 28 décembre 2023</text:span></text:p>
            <text:p><text:span text:style-name="T1">Mauvais</text:span></text:p>
            <text:p><text:span text:style-name="T1">Avec une note de 1,01,0Locaux saouls dans l hôtel et derange les clientes seulesUtilePas utile</text:span></text:p>
            <text:p><text:span text:style-name="T1"/></text:p>
            <text:p><text:span text:style-name="T1">EmmaActif depuis 2016Royaume-Uni</text:span></text:p>
            <text:p><text:span text:style-name="T1">Chambre Double avec Salle de Bains Privative</text:span></text:p>
            <text:p><text:span text:style-name="T1">2 nuits · décembre 2025</text:span></text:p>
            <text:p><text:span text:style-name="T1">Voyageur individuel</text:span></text:p>
            <text:p><text:span text:style-name="T1">Commentaire envoyé le 1er janvier 2026</text:span></text:p>
            <text:p><text:span text:style-name="T1">Très bien</text:span></text:p>
            <text:p><text:span text:style-name="T1">Avec une note de 8,08,0Very atmospheric, large rooms with arched ceilings. Friendly staff. Restaurant downstairs. Excellent location.Rooms were chilly (we stayed late Dec) and there was no hot water.Voir la traductionUtilePas utile</text:span></text:p>
            <text:p><text:span text:style-name="T1"/></text:p>
            <text:p><text:span text:style-name="T1">JanneActif depuis 2024Finlande</text:span></text:p>
            <text:p><text:span text:style-name="T1">Chambre Double avec Salle de Bains Privative</text:span></text:p>
            <text:p><text:span text:style-name="T1">3 nuits · novembre 2025</text:span></text:p>
            <text:p><text:span text:style-name="T1">Voyageur individuel</text:span></text:p>
            <text:p><text:span text:style-name="T1">Commentaire envoyé le 4 novembre 2025</text:span></text:p>
            <text:p><text:span text:style-name="T1">Amazing experience for a history geek</text:span></text:p>
            <text:p><text:span text:style-name="T1">Avec une note de 9,09,0First, you have to understand that this is a caravansary and not a modern hotel. With this in mind, the place was amazing! It was like stepping back in time hundreds of years - although they have installed running water and even air-conditioning to the rooms. Sure, many things could be repaired and maintained better (for example the toilet seat was not well fixed to the floor and was a bit wobbly, and the shower drain was clogged), but that just adds to its charm. If you're a history geek or just want to experience something different than the generic modern-style hotel rooms then this is a place for you! They ask a payment in advance with a bank transfer which sounded a bit suspicious but in the end everything went very well. The food in the restaurant is very good but quite expensive at local standards.The restaurant/bar in the courtyard and the mosque next door are very loud. The old wooden door made of a few planks doesn't insulate any noise. Also some cigarette smoke from the bar came to the room. On a Friday evening a religious ceremony in the mosque lasted until 10:30 pm and the bar was open until 11 pm. After that it got quiet for sleeping. The complimentary breakfast is very small, only tea/coffee, juice, an egg, white bread with spreadings, and a muffin. </text:span></text:p>
            <text:p><text:span text:style-name="T2"/></text:p>
          </table:table-cell>
          <table:table-cell table:number-columns-repeated="2"/>
          <table:table-cell office:value-type="float" office:value="7" calcext:value-type="float">
            <text:p>7</text:p>
          </table:table-cell>
          <table:table-cell table:number-columns-repeated="4"/>
          <table:table-cell table:style-name="Default" table:number-columns-repeated="16371"/>
        </table:table-row>
        <table:table-row table:style-name="ro1">
          <table:table-cell office:value-type="string" calcext:value-type="string">
            <text:p>Auberge de la Jeunesse</text:p>
          </table:table-cell>
          <table:table-cell table:number-columns-repeated="12"/>
          <table:table-cell table:style-name="Default" table:number-columns-repeated="16371"/>
        </table:table-row>
        <table:table-row table:style-name="ro1">
          <table:table-cell office:value-type="string" calcext:value-type="string">
            <text:p>Caribbean World Palma Djerba</text:p>
          </table:table-cell>
          <table:table-cell table:number-columns-repeated="12"/>
          <table:table-cell table:style-name="Default" table:number-columns-repeated="16371"/>
        </table:table-row>
        <table:table-row table:style-name="ro1">
          <table:table-cell office:value-type="string" calcext:value-type="string">
            <text:p>Carribean World Thalasso Djerba</text:p>
          </table:table-cell>
          <table:table-cell table:number-columns-repeated="12"/>
          <table:table-cell table:style-name="Default" table:number-columns-repeated="16371"/>
        </table:table-row>
        <table:table-row table:style-name="ro1">
          <table:table-cell office:value-type="string" calcext:value-type="string">
            <text:p>Cedriana Hotel</text:p>
          </table:table-cell>
          <table:table-cell table:number-columns-repeated="12"/>
          <table:table-cell table:style-name="Default" table:number-columns-repeated="16371"/>
        </table:table-row>
        <table:table-row table:style-name="ro1">
          <table:table-cell office:value-type="string" calcext:value-type="string">
            <text:p>Club Calimera Yati Beach</text:p>
          </table:table-cell>
          <table:table-cell table:number-columns-repeated="12"/>
          <table:table-cell table:style-name="Default" table:number-columns-repeated="16371"/>
        </table:table-row>
        <table:table-row table:style-name="ro1">
          <table:table-cell office:value-type="string" calcext:value-type="string">
            <text:p>Club Marmara Palm Beach Djerba</text:p>
          </table:table-cell>
          <table:table-cell table:number-columns-repeated="12"/>
          <table:table-cell table:style-name="Default" table:number-columns-repeated="16371"/>
        </table:table-row>
        <table:table-row table:style-name="ro1">
          <table:table-cell office:value-type="string" calcext:value-type="string">
            <text:p>Club Med Djerba Méridiana</text:p>
          </table:table-cell>
          <table:table-cell table:number-columns-repeated="12"/>
          <table:table-cell table:style-name="Default" table:number-columns-repeated="16371"/>
        </table:table-row>
        <table:table-row table:style-name="ro1">
          <table:table-cell office:value-type="string" calcext:value-type="string">
            <text:p>Complexe Hôtelier Dar Djerba</text:p>
          </table:table-cell>
          <table:table-cell table:number-columns-repeated="12"/>
          <table:table-cell table:style-name="Default" table:number-columns-repeated="16371"/>
        </table:table-row>
        <table:table-row table:style-name="ro1">
          <table:table-cell office:value-type="string" calcext:value-type="string">
            <text:p>Dar Chich Yahia</text:p>
          </table:table-cell>
          <table:table-cell table:number-columns-repeated="12"/>
          <table:table-cell table:style-name="Default" table:number-columns-repeated="16371"/>
        </table:table-row>
        <table:table-row table:style-name="ro1">
          <table:table-cell office:value-type="string" calcext:value-type="string">
            <text:p>Dar Lola</text:p>
          </table:table-cell>
          <table:table-cell table:number-columns-repeated="12"/>
          <table:table-cell table:style-name="Default" table:number-columns-repeated="16371"/>
        </table:table-row>
        <table:table-row table:style-name="ro1">
          <table:table-cell office:value-type="string" calcext:value-type="string">
            <text:p>Dar Salem</text:p>
          </table:table-cell>
          <table:table-cell table:number-columns-repeated="12"/>
          <table:table-cell table:style-name="Default" table:number-columns-repeated="16371"/>
        </table:table-row>
        <table:table-row table:style-name="ro1">
          <table:table-cell office:value-type="string" calcext:value-type="string">
            <text:p>Djerba Golf Resort &amp; Spa</text:p>
          </table:table-cell>
          <table:table-cell table:number-columns-repeated="12"/>
          <table:table-cell table:style-name="Default" table:number-columns-repeated="16371"/>
        </table:table-row>
        <table:table-row table:style-name="ro1">
          <table:table-cell office:value-type="string" calcext:value-type="string">
            <text:p>Djerba Holiday Beach</text:p>
          </table:table-cell>
          <table:table-cell table:number-columns-repeated="12"/>
          <table:table-cell table:style-name="Default" table:number-columns-repeated="16371"/>
        </table:table-row>
        <table:table-row table:style-name="ro1">
          <table:table-cell office:value-type="string" calcext:value-type="string">
            <text:p>Djerba Plaza Thalasso &amp; Spa</text:p>
          </table:table-cell>
          <table:table-cell table:number-columns-repeated="12"/>
          <table:table-cell table:style-name="Default" table:number-columns-repeated="16371"/>
        </table:table-row>
        <table:table-row table:style-name="ro1">
          <table:table-cell office:value-type="string" calcext:value-type="string">
            <text:p>Eden Village Djerba Mare</text:p>
          </table:table-cell>
          <table:table-cell table:number-columns-repeated="12"/>
          <table:table-cell table:style-name="Default" table:number-columns-repeated="16371"/>
        </table:table-row>
        <table:table-row table:style-name="ro1">
          <table:table-cell office:value-type="string" calcext:value-type="string">
            <text:p>El Mouradi Djerba Menzel</text:p>
          </table:table-cell>
          <table:table-cell table:number-columns-repeated="12"/>
          <table:table-cell table:style-name="Default" table:number-columns-repeated="16371"/>
        </table:table-row>
        <table:table-row table:style-name="ro1">
          <table:table-cell office:value-type="string" calcext:value-type="string">
            <text:p>Fiesta Beach Club</text:p>
          </table:table-cell>
          <table:table-cell table:number-columns-repeated="12"/>
          <table:table-cell table:style-name="Default" table:number-columns-repeated="16371"/>
        </table:table-row>
        <table:table-row table:style-name="ro1">
          <table:table-cell office:value-type="string" calcext:value-type="string">
            <text:p>Hari Club Beach Resort</text:p>
          </table:table-cell>
          <table:table-cell table:number-columns-repeated="12"/>
          <table:table-cell table:style-name="Default" table:number-columns-repeated="16371"/>
        </table:table-row>
        <table:table-row table:style-name="ro1">
          <table:table-cell office:value-type="string" calcext:value-type="string">
            <text:p>Hasdrubal Prestige Thalasso &amp; Spa Djerba</text:p>
          </table:table-cell>
          <table:table-cell table:number-columns-repeated="12"/>
          <table:table-cell table:style-name="Default" table:number-columns-repeated="16371"/>
        </table:table-row>
        <table:table-row table:style-name="ro1">
          <table:table-cell office:value-type="string" calcext:value-type="string">
            <text:p>Hotel Marhala</text:p>
          </table:table-cell>
          <table:table-cell table:number-columns-repeated="12"/>
          <table:table-cell table:style-name="Default" table:number-columns-repeated="16371"/>
        </table:table-row>
        <table:table-row table:style-name="ro1">
          <table:table-cell office:value-type="string" calcext:value-type="string">
            <text:p>Hotel Riad Meninx</text:p>
          </table:table-cell>
          <table:table-cell table:number-columns-repeated="12"/>
          <table:table-cell table:style-name="Default" table:number-columns-repeated="16371"/>
        </table:table-row>
        <table:table-row table:style-name="ro1">
          <table:table-cell office:value-type="string" calcext:value-type="string">
            <text:p>Hotel de charme et SPA Dar El Bhar</text:p>
          </table:table-cell>
          <table:table-cell table:number-columns-repeated="12"/>
          <table:table-cell table:style-name="Default" table:number-columns-repeated="16371"/>
        </table:table-row>
        <table:table-row table:style-name="ro1">
          <table:table-cell office:value-type="string" calcext:value-type="string">
            <text:p>Hôtel Abir</text:p>
          </table:table-cell>
          <table:table-cell table:number-columns-repeated="12"/>
          <table:table-cell table:style-name="Default" table:number-columns-repeated="16371"/>
        </table:table-row>
        <table:table-row table:style-name="ro1">
          <table:table-cell office:value-type="string" calcext:value-type="string">
            <text:p>Hôtel Club Meninx</text:p>
          </table:table-cell>
          <table:table-cell table:number-columns-repeated="12"/>
          <table:table-cell table:style-name="Default" table:number-columns-repeated="16371"/>
        </table:table-row>
        <table:table-row table:style-name="ro1">
          <table:table-cell office:value-type="string" calcext:value-type="string">
            <text:p>Hôtel Diar Yassine Djerba</text:p>
          </table:table-cell>
          <table:table-cell table:number-columns-repeated="12"/>
          <table:table-cell table:style-name="Default" table:number-columns-repeated="16371"/>
        </table:table-row>
        <table:table-row table:style-name="ro1">
          <table:table-cell office:value-type="string" calcext:value-type="string">
            <text:p>Hôtel El Andalous</text:p>
          </table:table-cell>
          <table:table-cell table:number-columns-repeated="12"/>
          <table:table-cell table:style-name="Default" table:number-columns-repeated="16371"/>
        </table:table-row>
        <table:table-row table:style-name="ro1">
          <table:table-cell office:value-type="string" calcext:value-type="string">
            <text:p>Hôtel Erriadh</text:p>
          </table:table-cell>
          <table:table-cell table:number-columns-repeated="12"/>
          <table:table-cell table:style-name="Default" table:number-columns-repeated="16371"/>
        </table:table-row>
        <table:table-row table:style-name="ro1">
          <table:table-cell office:value-type="string" calcext:value-type="string">
            <text:p>Hôtel Essalem</text:p>
          </table:table-cell>
          <table:table-cell table:number-columns-repeated="12"/>
          <table:table-cell table:style-name="Default" table:number-columns-repeated="16371"/>
        </table:table-row>
        <table:table-row table:style-name="ro1">
          <table:table-cell office:value-type="string" calcext:value-type="string">
            <text:p>Hôtel Flamingo</text:p>
          </table:table-cell>
          <table:table-cell table:number-columns-repeated="12"/>
          <table:table-cell table:style-name="Default" table:number-columns-repeated="16371"/>
        </table:table-row>
        <table:table-row table:style-name="ro1">
          <table:table-cell office:value-type="string" calcext:value-type="string">
            <text:p>Hôtel Golf Beach</text:p>
          </table:table-cell>
          <table:table-cell table:number-columns-repeated="12"/>
          <table:table-cell table:style-name="Default" table:number-columns-repeated="16371"/>
        </table:table-row>
        <table:table-row table:style-name="ro1">
          <table:table-cell office:value-type="string" calcext:value-type="string">
            <text:p>Hôtel Hacienda Djerba</text:p>
          </table:table-cell>
          <table:table-cell table:number-columns-repeated="12"/>
          <table:table-cell table:style-name="Default" table:number-columns-repeated="16371"/>
        </table:table-row>
        <table:table-row table:style-name="ro1">
          <table:table-cell office:value-type="string" calcext:value-type="string">
            <text:p>Hôtel Haroun</text:p>
          </table:table-cell>
          <table:table-cell table:number-columns-repeated="12"/>
          <table:table-cell table:style-name="Default" table:number-columns-repeated="16371"/>
        </table:table-row>
        <table:table-row table:style-name="ro1">
          <table:table-cell office:value-type="string" calcext:value-type="string">
            <text:p>Hôtel Homère</text:p>
          </table:table-cell>
          <table:table-cell table:number-columns-repeated="12"/>
          <table:table-cell table:style-name="Default" table:number-columns-repeated="16371"/>
        </table:table-row>
        <table:table-row table:style-name="ro1">
          <table:table-cell office:value-type="string" calcext:value-type="string">
            <text:p>Hôtel Ilyade</text:p>
          </table:table-cell>
          <table:table-cell table:number-columns-repeated="12"/>
          <table:table-cell table:style-name="Default" table:number-columns-repeated="16371"/>
        </table:table-row>
        <table:table-row table:style-name="ro1">
          <table:table-cell office:value-type="string" calcext:value-type="string">
            <text:p>Hôtel Les Alizes</text:p>
          </table:table-cell>
          <table:table-cell table:number-columns-repeated="12"/>
          <table:table-cell table:style-name="Default" table:number-columns-repeated="16371"/>
        </table:table-row>
        <table:table-row table:style-name="ro1">
          <table:table-cell office:value-type="string" calcext:value-type="string">
            <text:p>Hôtel Miramar</text:p>
          </table:table-cell>
          <table:table-cell table:number-columns-repeated="12"/>
          <table:table-cell table:style-name="Default" table:number-columns-repeated="16371"/>
        </table:table-row>
        <table:table-row table:style-name="ro1">
          <table:table-cell office:value-type="string" calcext:value-type="string">
            <text:p>Hôtel Palm Azur</text:p>
          </table:table-cell>
          <table:table-cell table:number-columns-repeated="12"/>
          <table:table-cell table:style-name="Default" table:number-columns-repeated="16371"/>
        </table:table-row>
        <table:table-row table:style-name="ro1">
          <table:table-cell office:value-type="string" calcext:value-type="string">
            <text:p>Hôtel Rais Club</text:p>
          </table:table-cell>
          <table:table-cell table:number-columns-repeated="12"/>
          <table:table-cell table:style-name="Default" table:number-columns-repeated="16371"/>
        </table:table-row>
        <table:table-row table:style-name="ro1">
          <table:table-cell office:value-type="string" calcext:value-type="string">
            <text:p>Hôtel Riu Palace Royal Garden Djerba</text:p>
          </table:table-cell>
          <table:table-cell table:number-columns-repeated="12"/>
          <table:table-cell table:style-name="Default" table:number-columns-repeated="16371"/>
        </table:table-row>
        <table:table-row table:style-name="ro1">
          <table:table-cell office:value-type="string" calcext:value-type="string">
            <text:p>Hôtel Rodes</text:p>
          </table:table-cell>
          <table:table-cell table:number-columns-repeated="12"/>
          <table:table-cell table:style-name="Default" table:number-columns-repeated="16371"/>
        </table:table-row>
        <table:table-row table:style-name="ro1">
          <table:table-cell office:value-type="string" calcext:value-type="string">
            <text:p>Hôtel Saray</text:p>
          </table:table-cell>
          <table:table-cell table:number-columns-repeated="12"/>
          <table:table-cell table:style-name="Default" table:number-columns-repeated="16371"/>
        </table:table-row>
        <table:table-row table:style-name="ro1">
          <table:table-cell office:value-type="string" calcext:value-type="string">
            <text:p>Hôtel Villa Azur</text:p>
          </table:table-cell>
          <table:table-cell table:number-columns-repeated="12"/>
          <table:table-cell table:style-name="Default" table:number-columns-repeated="16371"/>
        </table:table-row>
        <table:table-row table:style-name="ro1">
          <table:table-cell office:value-type="string" calcext:value-type="string">
            <text:p>Hôtel Vincci Djerba Resort &amp; Spa</text:p>
          </table:table-cell>
          <table:table-cell table:number-columns-repeated="12"/>
          <table:table-cell table:style-name="Default" table:number-columns-repeated="16371"/>
        </table:table-row>
        <table:table-row table:style-name="ro1">
          <table:table-cell office:value-type="string" calcext:value-type="string">
            <text:p>Hôtel Yadis Djerba Golf Thalasso &amp; Spa</text:p>
          </table:table-cell>
          <table:table-cell table:number-columns-repeated="12"/>
          <table:table-cell table:style-name="Default" table:number-columns-repeated="16371"/>
        </table:table-row>
        <table:table-row table:style-name="ro1">
          <table:table-cell office:value-type="string" calcext:value-type="string">
            <text:p>Isis Hotel</text:p>
          </table:table-cell>
          <table:table-cell table:number-columns-repeated="12"/>
          <table:table-cell table:style-name="Default" table:number-columns-repeated="16371"/>
        </table:table-row>
        <table:table-row table:style-name="ro1">
          <table:table-cell office:value-type="string" calcext:value-type="string">
            <text:p>Jasmina Thalassa</text:p>
          </table:table-cell>
          <table:table-cell table:number-columns-repeated="12"/>
          <table:table-cell table:style-name="Default" table:number-columns-repeated="16371"/>
        </table:table-row>
        <table:table-row table:style-name="ro1">
          <table:table-cell office:value-type="string" calcext:value-type="string">
            <text:p>Joya Paradise &amp; Spa</text:p>
          </table:table-cell>
          <table:table-cell table:number-columns-repeated="12"/>
          <table:table-cell table:style-name="Default" table:number-columns-repeated="16371"/>
        </table:table-row>
        <table:table-row table:style-name="ro1">
          <table:table-cell office:value-type="string" calcext:value-type="string">
            <text:p>Ksar Djerba</text:p>
          </table:table-cell>
          <table:table-cell table:number-columns-repeated="12"/>
          <table:table-cell table:style-name="Default" table:number-columns-repeated="16371"/>
        </table:table-row>
        <table:table-row table:style-name="ro1">
          <table:table-cell office:value-type="string" calcext:value-type="string">
            <text:p>Le Beau Séjour</text:p>
          </table:table-cell>
          <table:table-cell table:number-columns-repeated="12"/>
          <table:table-cell table:style-name="Default" table:number-columns-repeated="16371"/>
        </table:table-row>
        <table:table-row table:style-name="ro1">
          <table:table-cell office:value-type="string" calcext:value-type="string">
            <text:p>Le Patio de Mezraya</text:p>
          </table:table-cell>
          <table:table-cell table:number-columns-repeated="12"/>
          <table:table-cell table:style-name="Default" table:number-columns-repeated="16371"/>
        </table:table-row>
        <table:table-row table:style-name="ro1">
          <table:table-cell office:value-type="string" calcext:value-type="string">
            <text:p>Les Jardins De Toumana</text:p>
          </table:table-cell>
          <table:table-cell table:number-columns-repeated="12"/>
          <table:table-cell table:style-name="Default" table:number-columns-repeated="16371"/>
        </table:table-row>
        <table:table-row table:style-name="ro1">
          <table:table-cell office:value-type="string" calcext:value-type="string">
            <text:p>Les Sirenes Thalasso &amp; Spa</text:p>
          </table:table-cell>
          <table:table-cell table:number-columns-repeated="12"/>
          <table:table-cell table:style-name="Default" table:number-columns-repeated="16371"/>
        </table:table-row>
        <table:table-row table:style-name="ro1">
          <table:table-cell office:value-type="string" calcext:value-type="string">
            <text:p>Les palmes d'or</text:p>
          </table:table-cell>
          <table:table-cell table:number-columns-repeated="12"/>
          <table:table-cell table:style-name="Default" table:number-columns-repeated="16371"/>
        </table:table-row>
        <table:table-row table:style-name="ro1">
          <table:table-cell office:value-type="string" calcext:value-type="string">
            <text:p>Magic Live Club Penelope Beach</text:p>
          </table:table-cell>
          <table:table-cell table:number-columns-repeated="12"/>
          <table:table-cell table:style-name="Default" table:number-columns-repeated="16371"/>
        </table:table-row>
        <table:table-row table:style-name="ro1">
          <table:table-cell office:value-type="string" calcext:value-type="string">
            <text:p>Maison Leila</text:p>
          </table:table-cell>
          <table:table-cell table:number-columns-repeated="12"/>
          <table:table-cell table:style-name="Default" table:number-columns-repeated="16371"/>
        </table:table-row>
        <table:table-row table:style-name="ro1">
          <table:table-cell office:value-type="string" calcext:value-type="string">
            <text:p>Menzel Dija</text:p>
          </table:table-cell>
          <table:table-cell table:number-columns-repeated="12"/>
          <table:table-cell table:style-name="Default" table:number-columns-repeated="16371"/>
        </table:table-row>
        <table:table-row table:style-name="ro1">
          <table:table-cell office:value-type="string" calcext:value-type="string">
            <text:p>Palais des Iles</text:p>
          </table:table-cell>
          <table:table-cell table:number-columns-repeated="12"/>
          <table:table-cell table:style-name="Default" table:number-columns-repeated="16371"/>
        </table:table-row>
        <table:table-row table:style-name="ro1">
          <table:table-cell office:value-type="string" calcext:value-type="string">
            <text:p>Palm Azur</text:p>
          </table:table-cell>
          <table:table-cell table:number-columns-repeated="12"/>
          <table:table-cell table:style-name="Default" table:number-columns-repeated="16371"/>
        </table:table-row>
        <table:table-row table:style-name="ro1">
          <table:table-cell office:value-type="string" calcext:value-type="string">
            <text:p>Palm Beach Palace Djerba (ex-Sofitel)</text:p>
          </table:table-cell>
          <table:table-cell table:number-columns-repeated="12"/>
          <table:table-cell table:style-name="Default" table:number-columns-repeated="16371"/>
        </table:table-row>
        <table:table-row table:style-name="ro1">
          <table:table-cell office:value-type="string" calcext:value-type="string">
            <text:p>Plage Essaguia Djerba</text:p>
          </table:table-cell>
          <table:table-cell table:number-columns-repeated="12"/>
          <table:table-cell table:style-name="Default" table:number-columns-repeated="16371"/>
        </table:table-row>
        <table:table-row table:style-name="ro1">
          <table:table-cell office:value-type="string" calcext:value-type="string">
            <text:p>Prima Life Garden Park</text:p>
          </table:table-cell>
          <table:table-cell table:number-columns-repeated="12"/>
          <table:table-cell table:style-name="Default" table:number-columns-repeated="16371"/>
        </table:table-row>
        <table:table-row table:style-name="ro1">
          <table:table-cell office:value-type="string" calcext:value-type="string">
            <text:p>Radisson Blu Palace Resort &amp; Thalasso</text:p>
          </table:table-cell>
          <table:table-cell table:number-columns-repeated="12"/>
          <table:table-cell table:style-name="Default" table:number-columns-repeated="16371"/>
        </table:table-row>
        <table:table-row table:style-name="ro1">
          <table:table-cell office:value-type="string" calcext:value-type="string">
            <text:p>Raspizdos 1*</text:p>
          </table:table-cell>
          <table:table-cell table:number-columns-repeated="12"/>
          <table:table-cell table:style-name="Default" table:number-columns-repeated="16371"/>
        </table:table-row>
        <table:table-row table:style-name="ro1">
          <table:table-cell office:value-type="string" calcext:value-type="string">
            <text:p>Robinson Club Djerba Bahiya</text:p>
          </table:table-cell>
          <table:table-cell table:number-columns-repeated="12"/>
          <table:table-cell table:style-name="Default" table:number-columns-repeated="16371"/>
        </table:table-row>
        <table:table-row table:style-name="ro1">
          <table:table-cell office:value-type="string" calcext:value-type="string">
            <text:p>Royal Karthago Resort &amp; Thalasso Djerba</text:p>
          </table:table-cell>
          <table:table-cell table:number-columns-repeated="12"/>
          <table:table-cell table:style-name="Default" table:number-columns-repeated="16371"/>
        </table:table-row>
        <table:table-row table:style-name="ro1">
          <table:table-cell office:value-type="string" calcext:value-type="string">
            <text:p>Résidence Chahd</text:p>
          </table:table-cell>
          <table:table-cell/>
          <table:table-cell table:style-name="ce7"/>
          <table:table-cell table:number-columns-repeated="10"/>
          <table:table-cell table:style-name="Default" table:number-columns-repeated="16371"/>
        </table:table-row>
        <table:table-row table:style-name="ro1">
          <table:table-cell office:value-type="string" calcext:value-type="string">
            <text:p>Seabel Aladin Djerba</text:p>
          </table:table-cell>
          <table:table-cell/>
          <table:table-cell table:style-name="ce7"/>
          <table:table-cell table:number-columns-repeated="10"/>
          <table:table-cell table:style-name="Default" table:number-columns-repeated="16371"/>
        </table:table-row>
        <table:table-row table:style-name="ro1">
          <table:table-cell office:value-type="string" calcext:value-type="string">
            <text:p>Seabel Rym Beach Djerba</text:p>
          </table:table-cell>
          <table:table-cell/>
          <table:table-cell table:style-name="ce8"/>
          <table:table-cell table:number-columns-repeated="10"/>
          <table:table-cell table:style-name="Default" table:number-columns-repeated="16371"/>
        </table:table-row>
        <table:table-row table:style-name="ro1">
          <table:table-cell office:value-type="string" calcext:value-type="string">
            <text:p>Sentido Djerba Beach</text:p>
          </table:table-cell>
          <table:table-cell/>
          <table:table-cell table:style-name="ce8"/>
          <table:table-cell table:number-columns-repeated="10"/>
          <table:table-cell table:style-name="Default" table:number-columns-repeated="16371"/>
        </table:table-row>
        <table:table-row table:style-name="ro1">
          <table:table-cell office:value-type="string" calcext:value-type="string">
            <text:p>Sidi Mansour</text:p>
          </table:table-cell>
          <table:table-cell/>
          <table:table-cell table:style-name="ce8"/>
          <table:table-cell table:number-columns-repeated="10"/>
          <table:table-cell table:style-name="Default" table:number-columns-repeated="16371"/>
        </table:table-row>
        <table:table-row table:style-name="ro1">
          <table:table-cell office:value-type="string" calcext:value-type="string">
            <text:p>SunConnect Aqua Resort</text:p>
          </table:table-cell>
          <table:table-cell/>
          <table:table-cell table:style-name="ce8"/>
          <table:table-cell table:number-columns-repeated="10"/>
          <table:table-cell table:style-name="Default" table:number-columns-repeated="16371"/>
        </table:table-row>
        <table:table-row table:style-name="ro1">
          <table:table-cell office:value-type="string" calcext:value-type="string">
            <text:p>TUI MAGIC LIFE Club Penelope Beach Imperial</text:p>
          </table:table-cell>
          <table:table-cell/>
          <table:table-cell table:style-name="ce8"/>
          <table:table-cell table:number-columns-repeated="10"/>
          <table:table-cell table:style-name="Default" table:number-columns-repeated="16371"/>
        </table:table-row>
        <table:table-row table:style-name="ro1">
          <table:table-cell office:value-type="string" calcext:value-type="string">
            <text:p>Telemaque Beach &amp; Spa - All Inclusive - Families and Couples Only</text:p>
          </table:table-cell>
          <table:table-cell/>
          <table:table-cell table:style-name="ce7"/>
          <table:table-cell table:number-columns-repeated="10"/>
          <table:table-cell table:style-name="Default" table:number-columns-repeated="16371"/>
        </table:table-row>
        <table:table-row table:style-name="ro1">
          <table:table-cell office:value-type="string" calcext:value-type="string">
            <text:p>Ulysse Djerba Thalasso &amp; Spa</text:p>
          </table:table-cell>
          <table:table-cell/>
          <table:table-cell table:style-name="ce8"/>
          <table:table-cell table:number-columns-repeated="10"/>
          <table:table-cell table:style-name="Default" table:number-columns-repeated="16371"/>
        </table:table-row>
        <table:table-row table:style-name="ro1">
          <table:table-cell office:value-type="string" calcext:value-type="string">
            <text:p>Vincci AlKantara Thalassa Djerba Hotel</text:p>
          </table:table-cell>
          <table:table-cell/>
          <table:table-cell table:style-name="ce8"/>
          <table:table-cell table:number-columns-repeated="10"/>
          <table:table-cell table:style-name="Default" table:number-columns-repeated="16371"/>
        </table:table-row>
        <table:table-row table:style-name="ro1">
          <table:table-cell office:value-type="string" calcext:value-type="string">
            <text:p>Vincci Helios Beach</text:p>
          </table:table-cell>
          <table:table-cell/>
          <table:table-cell table:style-name="ce8"/>
          <table:table-cell table:number-columns-repeated="10"/>
          <table:table-cell table:style-name="Default" table:number-columns-repeated="16371"/>
        </table:table-row>
        <table:table-row table:style-name="ro1">
          <table:table-cell office:value-type="string" calcext:value-type="string">
            <text:p>Welcome Meridiana</text:p>
          </table:table-cell>
          <table:table-cell/>
          <table:table-cell table:style-name="ce7"/>
          <table:table-cell table:number-columns-repeated="10"/>
          <table:table-cell table:style-name="Default" table:number-columns-repeated="16371"/>
        </table:table-row>
        <table:table-row table:style-name="ro1">
          <table:table-cell office:value-type="string" calcext:value-type="string">
            <text:p>Yadis Imperial Beach &amp; Spa Resort</text:p>
          </table:table-cell>
          <table:table-cell/>
          <table:table-cell table:style-name="ce8"/>
          <table:table-cell table:number-columns-repeated="10"/>
          <table:table-cell table:style-name="Default" table:number-columns-repeated="16371"/>
        </table:table-row>
        <table:table-row table:style-name="ro1">
          <table:table-cell office:value-type="string" calcext:value-type="string">
            <text:p>orient djerba</text:p>
          </table:table-cell>
          <table:table-cell/>
          <table:table-cell table:style-name="ce8"/>
          <table:table-cell table:number-columns-repeated="10"/>
          <table:table-cell table:style-name="Default" table:number-columns-repeated="16371"/>
        </table:table-row>
        <table:table-row table:style-name="ro1" table:number-rows-repeated="3">
          <table:table-cell table:number-columns-repeated="2"/>
          <table:table-cell table:style-name="ce8"/>
          <table:table-cell table:number-columns-repeated="10"/>
          <table:table-cell table:style-name="Default" table:number-columns-repeated="16371"/>
        </table:table-row>
        <table:table-row table:style-name="ro1">
          <table:table-cell table:number-columns-repeated="2"/>
          <table:table-cell table:style-name="ce7"/>
          <table:table-cell table:number-columns-repeated="10"/>
          <table:table-cell table:style-name="Default" table:number-columns-repeated="16371"/>
        </table:table-row>
        <table:table-row table:style-name="ro1" table:number-rows-repeated="8">
          <table:table-cell table:number-columns-repeated="2"/>
          <table:table-cell table:style-name="ce8"/>
          <table:table-cell table:number-columns-repeated="10"/>
          <table:table-cell table:style-name="Default" table:number-columns-repeated="16371"/>
        </table:table-row>
        <table:table-row table:style-name="ro1">
          <table:table-cell table:number-columns-repeated="2"/>
          <table:table-cell table:style-name="ce7"/>
          <table:table-cell table:number-columns-repeated="10"/>
          <table:table-cell table:style-name="Default" table:number-columns-repeated="16371"/>
        </table:table-row>
        <table:table-row table:style-name="ro1" table:number-rows-repeated="3">
          <table:table-cell table:number-columns-repeated="2"/>
          <table:table-cell table:style-name="ce8"/>
          <table:table-cell table:number-columns-repeated="10"/>
          <table:table-cell table:style-name="Default" table:number-columns-repeated="16371"/>
        </table:table-row>
        <table:table-row table:style-name="ro1">
          <table:table-cell table:number-columns-repeated="2"/>
          <table:table-cell table:style-name="ce8"/>
          <table:table-cell table:number-columns-repeated="10"/>
          <table:table-cell table:style-name="Default" table:number-columns-repeated="16371"/>
        </table:table-row>
      </table:table>
      <table:table table:name="Feuille2" table:style-name="ta2">
        <office:forms form:automatic-focus="false" form:apply-design-mode="false"/>
        <table:table-column table:style-name="co11" table:default-cell-style-name="Default"/>
        <table:table-row table:style-name="ro5">
          <table:table-cell table:style-name="ce6" office:value-type="string" calcext:value-type="string">
            <text:p>Vincci Flora Park</text:p>
          </table:table-cell>
        </table:table-row>
        <table:table-row table:style-name="ro5">
          <table:table-cell table:style-name="ce6" office:value-type="string" calcext:value-type="string">
            <text:p>Royal Tulip Taj Sultan</text:p>
          </table:table-cell>
        </table:table-row>
        <table:table-row table:style-name="ro5">
          <table:table-cell table:style-name="ce6" office:value-type="string" calcext:value-type="string">
            <text:p>Hôtel Lynda</text:p>
          </table:table-cell>
        </table:table-row>
        <table:table-row table:style-name="ro5">
          <table:table-cell table:style-name="ce6" office:value-type="string" calcext:value-type="string">
            <text:p>Hôtel Cypres</text:p>
          </table:table-cell>
        </table:table-row>
        <table:table-row table:style-name="ro5">
          <table:table-cell table:style-name="ce6" office:value-type="string" calcext:value-type="string">
            <text:p>L'Atrium</text:p>
          </table:table-cell>
        </table:table-row>
        <table:table-row table:style-name="ro5">
          <table:table-cell table:style-name="ce6" office:value-type="string" calcext:value-type="string">
            <text:p>Dar Zakaria</text:p>
          </table:table-cell>
        </table:table-row>
        <table:table-row table:style-name="ro5">
          <table:table-cell table:style-name="ce6" office:value-type="string" calcext:value-type="string">
            <text:p>Hôtel Mirage Beach Club</text:p>
          </table:table-cell>
        </table:table-row>
        <table:table-row table:style-name="ro5">
          <table:table-cell table:style-name="ce6" office:value-type="string" calcext:value-type="string">
            <text:p>Hôtel Eldorador Salammbô en Menzels</text:p>
          </table:table-cell>
        </table:table-row>
        <table:table-row table:style-name="ro5">
          <table:table-cell table:style-name="ce6" office:value-type="string" calcext:value-type="string">
            <text:p>TUI SENSIMAR OCEANA RESORT AND SPA</text:p>
          </table:table-cell>
        </table:table-row>
        <table:table-row table:style-name="ro5">
          <table:table-cell table:style-name="ce6" office:value-type="string" calcext:value-type="string">
            <text:p>Thalassa Shalimar Hotel</text:p>
          </table:table-cell>
        </table:table-row>
        <table:table-row table:style-name="ro5">
          <table:table-cell table:style-name="ce6" office:value-type="string" calcext:value-type="string">
            <text:p>TUI Magic Life Africana</text:p>
          </table:table-cell>
        </table:table-row>
        <table:table-row table:style-name="ro5">
          <table:table-cell table:style-name="ce6" office:value-type="string" calcext:value-type="string">
            <text:p>Iberostar Selection Mirage Hammamet</text:p>
          </table:table-cell>
        </table:table-row>
        <table:table-row table:style-name="ro5">
          <table:table-cell table:style-name="ce6" office:value-type="string" calcext:value-type="string">
            <text:p>Delfino Beach Resort &amp; Spa</text:p>
          </table:table-cell>
        </table:table-row>
        <table:table-row table:style-name="ro5">
          <table:table-cell table:style-name="ce6" office:value-type="string" calcext:value-type="string">
            <text:p>Hôtel Sindbad</text:p>
          </table:table-cell>
        </table:table-row>
        <table:table-row table:style-name="ro5">
          <table:table-cell table:style-name="ce6" office:value-type="string" calcext:value-type="string">
            <text:p>Laico Hammamet Hotel</text:p>
          </table:table-cell>
        </table:table-row>
        <table:table-row table:style-name="ro5">
          <table:table-cell table:style-name="ce6" office:value-type="string" calcext:value-type="string">
            <text:p>Tui blue Palm Beach Hammamet</text:p>
          </table:table-cell>
        </table:table-row>
        <table:table-row table:style-name="ro5">
          <table:table-cell table:style-name="ce6" office:value-type="string" calcext:value-type="string">
            <text:p>Hôtel Aziza Thalasso Golf</text:p>
          </table:table-cell>
        </table:table-row>
        <table:table-row table:style-name="ro5">
          <table:table-cell table:style-name="ce6" office:value-type="string" calcext:value-type="string">
            <text:p>Hôtel Dalia</text:p>
          </table:table-cell>
        </table:table-row>
        <table:table-row table:style-name="ro5">
          <table:table-cell table:style-name="ce6" office:value-type="string" calcext:value-type="string">
            <text:p>Le Sultan</text:p>
          </table:table-cell>
        </table:table-row>
        <table:table-row table:style-name="ro5">
          <table:table-cell table:style-name="ce6" office:value-type="string" calcext:value-type="string">
            <text:p>Hôtel Mediterranée Thalasso Golf</text:p>
          </table:table-cell>
        </table:table-row>
        <table:table-row table:style-name="ro5">
          <table:table-cell table:style-name="ce6" office:value-type="string" calcext:value-type="string">
            <text:p>L'ARABESK Hôtel</text:p>
          </table:table-cell>
        </table:table-row>
        <table:table-row table:style-name="ro5">
          <table:table-cell table:style-name="ce6" office:value-type="string" calcext:value-type="string">
            <text:p>SENTIDO Aziza Beach</text:p>
          </table:table-cell>
        </table:table-row>
        <table:table-row table:style-name="ro5">
          <table:table-cell table:style-name="ce6" office:value-type="string" calcext:value-type="string">
            <text:p>Hammamet Hotel Viertel</text:p>
          </table:table-cell>
        </table:table-row>
        <table:table-row table:style-name="ro5">
          <table:table-cell table:style-name="ce6" office:value-type="string" calcext:value-type="string">
            <text:p>Magic Life Manar</text:p>
          </table:table-cell>
        </table:table-row>
        <table:table-row table:style-name="ro5">
          <table:table-cell table:style-name="ce6" office:value-type="string" calcext:value-type="string">
            <text:p>Hôtel Imperial Park</text:p>
          </table:table-cell>
        </table:table-row>
        <table:table-row table:style-name="ro5">
          <table:table-cell table:style-name="ce6" office:value-type="string" calcext:value-type="string">
            <text:p>Hôtel Marina Palace</text:p>
          </table:table-cell>
        </table:table-row>
        <table:table-row table:style-name="ro5">
          <table:table-cell table:style-name="ce6" office:value-type="string" calcext:value-type="string">
            <text:p>Hôtel Houda Yasmine</text:p>
          </table:table-cell>
        </table:table-row>
        <table:table-row table:style-name="ro5">
          <table:table-cell table:style-name="ce6" office:value-type="string" calcext:value-type="string">
            <text:p>The Russelior Hotel &amp; Spa</text:p>
          </table:table-cell>
        </table:table-row>
        <table:table-row table:style-name="ro5">
          <table:table-cell table:style-name="ce6" office:value-type="string" calcext:value-type="string">
            <text:p>Hôtel Neptune</text:p>
          </table:table-cell>
        </table:table-row>
        <table:table-row table:style-name="ro5">
          <table:table-cell table:style-name="ce6" office:value-type="string" calcext:value-type="string">
            <text:p>Hasdrubal Thalassa And Spa</text:p>
          </table:table-cell>
        </table:table-row>
        <table:table-row table:style-name="ro5">
          <table:table-cell table:style-name="ce6" office:value-type="string" calcext:value-type="string">
            <text:p>Hôtel Bravo Hammamet</text:p>
          </table:table-cell>
        </table:table-row>
        <table:table-row table:style-name="ro5">
          <table:table-cell table:style-name="ce6" office:value-type="string" calcext:value-type="string">
            <text:p>Hôtel Basen Bahia Beach</text:p>
          </table:table-cell>
        </table:table-row>
        <table:table-row table:style-name="ro5">
          <table:table-cell table:style-name="ce6" office:value-type="string" calcext:value-type="string">
            <text:p>Hôtel El Mouradi El Menzah</text:p>
          </table:table-cell>
        </table:table-row>
        <table:table-row table:style-name="ro5">
          <table:table-cell table:style-name="ce6" office:value-type="string" calcext:value-type="string">
            <text:p>Hôtel El Olf Las Palmas</text:p>
          </table:table-cell>
        </table:table-row>
        <table:table-row table:style-name="ro5">
          <table:table-cell table:style-name="ce6" office:value-type="string" calcext:value-type="string">
            <text:p>Hôtel Excel</text:p>
          </table:table-cell>
        </table:table-row>
        <table:table-row table:style-name="ro5">
          <table:table-cell table:style-name="ce6" office:value-type="string" calcext:value-type="string">
            <text:p>Hôtel Green Golf</text:p>
          </table:table-cell>
        </table:table-row>
        <table:table-row table:style-name="ro5">
          <table:table-cell table:style-name="ce6" office:value-type="string" calcext:value-type="string">
            <text:p>Hôtel Majesty Golf</text:p>
          </table:table-cell>
        </table:table-row>
        <table:table-row table:style-name="ro5">
          <table:table-cell table:style-name="ce6" office:value-type="string" calcext:value-type="string">
            <text:p>Vincci Marillia</text:p>
          </table:table-cell>
        </table:table-row>
        <table:table-row table:style-name="ro5">
          <table:table-cell table:style-name="ce6" office:value-type="string" calcext:value-type="string">
            <text:p>Alhambra Thalasso Hammamet</text:p>
          </table:table-cell>
        </table:table-row>
        <table:table-row table:style-name="ro5">
          <table:table-cell table:style-name="ce6" office:value-type="string" calcext:value-type="string">
            <text:p>Hôtel Mechmoum</text:p>
          </table:table-cell>
        </table:table-row>
        <table:table-row table:style-name="ro5">
          <table:table-cell table:style-name="ce6" office:value-type="string" calcext:value-type="string">
            <text:p>Hôtel Safa</text:p>
          </table:table-cell>
        </table:table-row>
        <table:table-row table:style-name="ro5">
          <table:table-cell table:style-name="ce6" office:value-type="string" calcext:value-type="string">
            <text:p>Hôtel Mahari</text:p>
          </table:table-cell>
        </table:table-row>
        <table:table-row table:style-name="ro5">
          <table:table-cell table:style-name="ce6" office:value-type="string" calcext:value-type="string">
            <text:p>Hôtel Sofitel Saphir Palace</text:p>
          </table:table-cell>
        </table:table-row>
        <table:table-row table:style-name="ro5">
          <table:table-cell table:style-name="ce6" office:value-type="string" calcext:value-type="string">
            <text:p>Hôtel Shell Beach</text:p>
          </table:table-cell>
        </table:table-row>
        <table:table-row table:style-name="ro5">
          <table:table-cell table:style-name="ce6" office:value-type="string" calcext:value-type="string">
            <text:p>Hôtel Lella Baya</text:p>
          </table:table-cell>
        </table:table-row>
        <table:table-row table:style-name="ro5">
          <table:table-cell table:style-name="ce6" office:value-type="string" calcext:value-type="string">
            <text:p>Hôtel Yasmine Beach</text:p>
          </table:table-cell>
        </table:table-row>
        <table:table-row table:style-name="ro5">
          <table:table-cell table:style-name="ce6" office:value-type="string" calcext:value-type="string">
            <text:p>Hôtel Zodiac</text:p>
          </table:table-cell>
        </table:table-row>
        <table:table-row table:style-name="ro5">
          <table:table-cell table:style-name="ce6" office:value-type="string" calcext:value-type="string">
            <text:p>Hôtel Chich Khan</text:p>
          </table:table-cell>
        </table:table-row>
        <table:table-row table:style-name="ro5">
          <table:table-cell table:style-name="ce6" office:value-type="string" calcext:value-type="string">
            <text:p>Hôtel Solaria &amp; Thalasso</text:p>
          </table:table-cell>
        </table:table-row>
        <table:table-row table:style-name="ro5">
          <table:table-cell table:style-name="ce6" office:value-type="string" calcext:value-type="string">
            <text:p>Majesty Golf Hotel</text:p>
          </table:table-cell>
        </table:table-row>
        <table:table-row table:style-name="ro5">
          <table:table-cell table:style-name="ce6" office:value-type="string" calcext:value-type="string">
            <text:p>Medence Hotel Sandra</text:p>
          </table:table-cell>
        </table:table-row>
        <table:table-row table:style-name="ro5">
          <table:table-cell table:style-name="ce6" office:value-type="string" calcext:value-type="string">
            <text:p>SplashWorld AQI Venus Beach</text:p>
          </table:table-cell>
        </table:table-row>
        <table:table-row table:style-name="ro5">
          <table:table-cell table:style-name="ce6" office:value-type="string" calcext:value-type="string">
            <text:p>La Couronne Hammamet</text:p>
          </table:table-cell>
        </table:table-row>
        <table:table-row table:style-name="ro5">
          <table:table-cell table:style-name="ce6" office:value-type="string" calcext:value-type="string">
            <text:p>Le Hammamet Hotel &amp; Spa</text:p>
          </table:table-cell>
        </table:table-row>
        <table:table-row table:style-name="ro5">
          <table:table-cell table:style-name="ce6" office:value-type="string" calcext:value-type="string">
            <text:p>Hotel Khayam Garden Beach &amp; Spa Nabeul</text:p>
          </table:table-cell>
        </table:table-row>
        <table:table-row table:style-name="ro5">
          <table:table-cell table:style-name="ce6" office:value-type="string" calcext:value-type="string">
            <text:p>Les Pyramides Hotel Club &amp; Spa</text:p>
          </table:table-cell>
        </table:table-row>
        <table:table-row table:style-name="ro5">
          <table:table-cell table:style-name="ce6" office:value-type="string" calcext:value-type="string">
            <text:p>Hôtel Kheops</text:p>
          </table:table-cell>
        </table:table-row>
        <table:table-row table:style-name="ro5">
          <table:table-cell table:style-name="ce6" office:value-type="string" calcext:value-type="string">
            <text:p>Club Med Hammamet</text:p>
          </table:table-cell>
        </table:table-row>
        <table:table-row table:style-name="ro5">
          <table:table-cell table:style-name="ce6" office:value-type="string" calcext:value-type="string">
            <text:p>El Mouradi Beach Hotel</text:p>
          </table:table-cell>
        </table:table-row>
        <table:table-row table:style-name="ro5">
          <table:table-cell table:style-name="ce6" office:value-type="string" calcext:value-type="string">
            <text:p>Hôtel Club El Fell</text:p>
          </table:table-cell>
        </table:table-row>
        <table:table-row table:style-name="ro5">
          <table:table-cell table:style-name="ce6" office:value-type="string" calcext:value-type="string">
            <text:p>Hôtel Royal Nozha</text:p>
          </table:table-cell>
        </table:table-row>
        <table:table-row table:style-name="ro5">
          <table:table-cell table:style-name="ce6" office:value-type="string" calcext:value-type="string">
            <text:p>Vincci Nozha Beach &amp; Spa</text:p>
          </table:table-cell>
        </table:table-row>
        <table:table-row table:style-name="ro5">
          <table:table-cell table:style-name="ce6" office:value-type="string" calcext:value-type="string">
            <text:p>Paradis Palace</text:p>
          </table:table-cell>
        </table:table-row>
        <table:table-row table:style-name="ro5">
          <table:table-cell table:style-name="ce6" office:value-type="string" calcext:value-type="string">
            <text:p>L'Opera</text:p>
          </table:table-cell>
        </table:table-row>
        <table:table-row table:style-name="ro5">
          <table:table-cell table:style-name="ce6" office:value-type="string" calcext:value-type="string">
            <text:p>Résidence Romène</text:p>
          </table:table-cell>
        </table:table-row>
        <table:table-row table:style-name="ro5">
          <table:table-cell table:style-name="ce6" office:value-type="string" calcext:value-type="string">
            <text:p>Diar Erriadh</text:p>
          </table:table-cell>
        </table:table-row>
        <table:table-row table:style-name="ro5">
          <table:table-cell table:style-name="ce6" office:value-type="string" calcext:value-type="string">
            <text:p>Diar Elbousten</text:p>
          </table:table-cell>
        </table:table-row>
        <table:table-row table:style-name="ro5">
          <table:table-cell table:style-name="ce6" office:value-type="string" calcext:value-type="string">
            <text:p>Diar Sidi Bou Said</text:p>
          </table:table-cell>
        </table:table-row>
        <table:table-row table:style-name="ro5">
          <table:table-cell table:style-name="ce6" office:value-type="string" calcext:value-type="string">
            <text:p>Radisson Blu Resort &amp; Thalasso, Hammamet</text:p>
          </table:table-cell>
        </table:table-row>
        <table:table-row table:style-name="ro5">
          <table:table-cell table:style-name="ce6" office:value-type="string" calcext:value-type="string">
            <text:p>Maison des Jeunes</text:p>
          </table:table-cell>
        </table:table-row>
        <table:table-row table:style-name="ro5">
          <table:table-cell table:style-name="ce6" office:value-type="string" calcext:value-type="string">
            <text:p>Azur Plaza</text:p>
          </table:table-cell>
        </table:table-row>
        <table:table-row table:style-name="ro5">
          <table:table-cell table:style-name="ce6" office:value-type="string" calcext:value-type="string">
            <text:p>Dar R'Bat</text:p>
          </table:table-cell>
        </table:table-row>
        <table:table-row table:style-name="ro5">
          <table:table-cell table:style-name="ce6" office:value-type="string" calcext:value-type="string">
            <text:p>Hôtel Byzance</text:p>
          </table:table-cell>
        </table:table-row>
        <table:table-row table:style-name="ro5">
          <table:table-cell table:style-name="ce6" office:value-type="string" calcext:value-type="string">
            <text:p>Dar Oum El Khair</text:p>
          </table:table-cell>
        </table:table-row>
        <table:table-row table:style-name="ro5">
          <table:table-cell table:style-name="ce6" office:value-type="string" calcext:value-type="string">
            <text:p>Les Vagues Home</text:p>
          </table:table-cell>
        </table:table-row>
        <table:table-row table:style-name="ro5">
          <table:table-cell table:style-name="ce6" office:value-type="string" calcext:value-type="string">
            <text:p>Villa De Anes Ben Gabsia</text:p>
          </table:table-cell>
        </table:table-row>
        <table:table-row table:style-name="ro5">
          <table:table-cell table:style-name="ce6" office:value-type="string" calcext:value-type="string">
            <text:p>Résidence Al Insaf</text:p>
          </table:table-cell>
        </table:table-row>
        <table:table-row table:style-name="ro5">
          <table:table-cell table:style-name="ce6" office:value-type="string" calcext:value-type="string">
            <text:p>Résidence Costa Marina</text:p>
          </table:table-cell>
        </table:table-row>
        <table:table-row table:style-name="ro5">
          <table:table-cell table:style-name="ce6" office:value-type="string" calcext:value-type="string">
            <text:p>Résidence Néapolis</text:p>
          </table:table-cell>
        </table:table-row>
        <table:table-row table:style-name="ro5">
          <table:table-cell table:style-name="ce6" office:value-type="string" calcext:value-type="string">
            <text:p>Hammamet Ela Apartments</text:p>
          </table:table-cell>
        </table:table-row>
        <table:table-row table:style-name="ro5">
          <table:table-cell table:style-name="ce6" office:value-type="string" calcext:value-type="string">
            <text:p>Le Lagon De HAMMAMET</text:p>
          </table:table-cell>
        </table:table-row>
        <table:table-row table:style-name="ro5">
          <table:table-cell table:style-name="ce6" office:value-type="string" calcext:value-type="string">
            <text:p>LUXE Apartment</text:p>
          </table:table-cell>
        </table:table-row>
        <table:table-row table:style-name="ro5">
          <table:table-cell table:style-name="ce6" office:value-type="string" calcext:value-type="string">
            <text:p>Espace Le Jardin</text:p>
          </table:table-cell>
        </table:table-row>
        <table:table-row table:style-name="ro5">
          <table:table-cell table:style-name="ce6" office:value-type="string" calcext:value-type="string">
            <text:p>Résidence Ahmed</text:p>
          </table:table-cell>
        </table:table-row>
        <table:table-row table:style-name="ro5">
          <table:table-cell table:style-name="ce6" office:value-type="string" calcext:value-type="string">
            <text:p>Résidence Mimosas</text:p>
          </table:table-cell>
        </table:table-row>
        <table:table-row table:style-name="ro5">
          <table:table-cell table:style-name="ce6" office:value-type="string" calcext:value-type="string">
            <text:p>Dar Taieb</text:p>
          </table:table-cell>
        </table:table-row>
        <table:table-row table:style-name="ro5">
          <table:table-cell table:style-name="ce6" office:value-type="string" calcext:value-type="string">
            <text:p>Dar Ennasr</text:p>
          </table:table-cell>
        </table:table-row>
        <table:table-row table:style-name="ro5">
          <table:table-cell table:style-name="ce6" office:value-type="string" calcext:value-type="string">
            <text:p>Douja Apartment</text:p>
          </table:table-cell>
        </table:table-row>
        <table:table-row table:style-name="ro5">
          <table:table-cell table:style-name="ce6" office:value-type="string" calcext:value-type="string">
            <text:p>Appartement Nabeul</text:p>
          </table:table-cell>
        </table:table-row>
        <table:table-row table:style-name="ro5">
          <table:table-cell table:style-name="ce6" office:value-type="string" calcext:value-type="string">
            <text:p>Costa Marina</text:p>
          </table:table-cell>
        </table:table-row>
        <table:table-row table:style-name="ro5">
          <table:table-cell table:style-name="ce6" office:value-type="string" calcext:value-type="string">
            <text:p>Espace La Cascade</text:p>
          </table:table-cell>
        </table:table-row>
        <table:table-row table:style-name="ro5">
          <table:table-cell table:style-name="ce6" office:value-type="string" calcext:value-type="string">
            <text:p>EZZAHRA</text:p>
          </table:table-cell>
        </table:table-row>
        <table:table-row table:style-name="ro5">
          <table:table-cell table:style-name="ce6" office:value-type="string" calcext:value-type="string">
            <text:p>Riadh Andalus</text:p>
          </table:table-cell>
        </table:table-row>
        <table:table-row table:style-name="ro5">
          <table:table-cell table:style-name="ce6" office:value-type="string" calcext:value-type="string">
            <text:p>Résidence Panorama</text:p>
          </table:table-cell>
        </table:table-row>
        <table:table-row table:style-name="ro5">
          <table:table-cell table:style-name="ce6" office:value-type="string" calcext:value-type="string">
            <text:p>Résidence Côte d'Azur Hammamet</text:p>
          </table:table-cell>
        </table:table-row>
        <table:table-row table:style-name="ro5">
          <table:table-cell table:style-name="ce6" office:value-type="string" calcext:value-type="string">
            <text:p>Hôtel Hamilton</text:p>
          </table:table-cell>
        </table:table-row>
        <table:table-row table:style-name="ro5">
          <table:table-cell table:style-name="ce6" office:value-type="string" calcext:value-type="string">
            <text:p>Palais Présidentiel de Hammamet</text:p>
          </table:table-cell>
        </table:table-row>
        <table:table-row table:style-name="ro5">
          <table:table-cell table:style-name="ce6" office:value-type="string" calcext:value-type="string">
            <text:p>Nahrawess Hotel &amp; Spa Resort</text:p>
          </table:table-cell>
        </table:table-row>
        <table:table-row table:style-name="ro5">
          <table:table-cell table:style-name="ce6" office:value-type="string" calcext:value-type="string">
            <text:p>Le Zénith</text:p>
          </table:table-cell>
        </table:table-row>
        <table:table-row table:style-name="ro5">
          <table:table-cell table:style-name="ce6" office:value-type="string" calcext:value-type="string">
            <text:p>Yadis Hammamet Club</text:p>
          </table:table-cell>
        </table:table-row>
        <table:table-row table:style-name="ro5">
          <table:table-cell table:style-name="ce6" office:value-type="string" calcext:value-type="string">
            <text:p>Hôtel Albatros Hammamet</text:p>
          </table:table-cell>
        </table:table-row>
        <table:table-row table:style-name="ro5">
          <table:table-cell table:style-name="ce6" office:value-type="string" calcext:value-type="string">
            <text:p>Hôtel Club Président</text:p>
          </table:table-cell>
        </table:table-row>
        <table:table-row table:style-name="ro5">
          <table:table-cell table:style-name="ce6" office:value-type="string" calcext:value-type="string">
            <text:p>Club Marmara Hammamet Beach</text:p>
          </table:table-cell>
        </table:table-row>
        <table:table-row table:style-name="ro5">
          <table:table-cell table:style-name="ce6" office:value-type="string" calcext:value-type="string">
            <text:p>Résidence Sami</text:p>
          </table:table-cell>
        </table:table-row>
        <table:table-row table:style-name="ro5">
          <table:table-cell table:style-name="ce6" office:value-type="string" calcext:value-type="string">
            <text:p>Delphin Jardin</text:p>
          </table:table-cell>
        </table:table-row>
        <table:table-row table:style-name="ro5">
          <table:table-cell table:style-name="ce6" office:value-type="string" calcext:value-type="string">
            <text:p>Hôtel Ceramic</text:p>
          </table:table-cell>
        </table:table-row>
        <table:table-row table:style-name="ro5">
          <table:table-cell table:style-name="ce6" office:value-type="string" calcext:value-type="string">
            <text:p>El Manara</text:p>
          </table:table-cell>
        </table:table-row>
        <table:table-row table:style-name="ro5">
          <table:table-cell table:style-name="ce6" office:value-type="string" calcext:value-type="string">
            <text:p>Résidence Wafi</text:p>
          </table:table-cell>
        </table:table-row>
        <table:table-row table:style-name="ro5">
          <table:table-cell table:style-name="ce6" office:value-type="string" calcext:value-type="string">
            <text:p>Diar Skander</text:p>
          </table:table-cell>
        </table:table-row>
        <table:table-row table:style-name="ro5">
          <table:table-cell table:style-name="ce6" office:value-type="string" calcext:value-type="string">
            <text:p>Hôtel Les Colombes</text:p>
          </table:table-cell>
        </table:table-row>
        <table:table-row table:style-name="ro5">
          <table:table-cell table:style-name="ce6" office:value-type="string" calcext:value-type="string">
            <text:p>Dar Khayam Hôtel</text:p>
          </table:table-cell>
        </table:table-row>
        <table:table-row table:style-name="ro5">
          <table:table-cell table:style-name="ce6" office:value-type="string" calcext:value-type="string">
            <text:p>Hôtel Les Citronniers Hammamet Tunisia</text:p>
          </table:table-cell>
        </table:table-row>
        <table:table-row table:style-name="ro5">
          <table:table-cell table:style-name="ce6" office:value-type="string" calcext:value-type="string">
            <text:p>Les Orangers Garden Villas &amp; Bungalows</text:p>
          </table:table-cell>
        </table:table-row>
        <table:table-row table:style-name="ro5">
          <table:table-cell table:style-name="ce6" office:value-type="string" calcext:value-type="string">
            <text:p>Villa Sindbad</text:p>
          </table:table-cell>
        </table:table-row>
        <table:table-row table:style-name="ro5">
          <table:table-cell table:style-name="ce6" office:value-type="string" calcext:value-type="string">
            <text:p>Les Palmiers Centre de Vacances</text:p>
          </table:table-cell>
        </table:table-row>
        <table:table-row table:style-name="ro5">
          <table:table-cell table:style-name="ce6" office:value-type="string" calcext:value-type="string">
            <text:p>Villa Mahbouba</text:p>
          </table:table-cell>
        </table:table-row>
        <table:table-row table:style-name="ro5">
          <table:table-cell table:style-name="ce6" office:value-type="string" calcext:value-type="string">
            <text:p>Dar Zahir</text:p>
          </table:table-cell>
        </table:table-row>
        <table:table-row table:style-name="ro5">
          <table:table-cell table:style-name="ce6" office:value-type="string" calcext:value-type="string">
            <text:p>Ideal Apartment For Families</text:p>
          </table:table-cell>
        </table:table-row>
        <table:table-row table:style-name="ro5">
          <table:table-cell table:style-name="ce6" office:value-type="string" calcext:value-type="string">
            <text:p>Hôtel SAMARIS</text:p>
          </table:table-cell>
        </table:table-row>
        <table:table-row table:style-name="ro5">
          <table:table-cell table:style-name="ce6" office:value-type="string" calcext:value-type="string">
            <text:p>Hôtel Garsaa</text:p>
          </table:table-cell>
        </table:table-row>
        <table:table-row table:style-name="ro5">
          <table:table-cell table:style-name="ce6" office:value-type="string" calcext:value-type="string">
            <text:p>Résidence La Perle De Hammamet</text:p>
          </table:table-cell>
        </table:table-row>
        <table:table-row table:style-name="ro5">
          <table:table-cell table:style-name="ce6" office:value-type="string" calcext:value-type="string">
            <text:p>Hammam Gharbi</text:p>
          </table:table-cell>
        </table:table-row>
        <table:table-row table:style-name="ro5">
          <table:table-cell table:style-name="ce6" office:value-type="string" calcext:value-type="string">
            <text:p>Yasmine</text:p>
          </table:table-cell>
        </table:table-row>
        <table:table-row table:style-name="ro5">
          <table:table-cell table:style-name="ce6" office:value-type="string" calcext:value-type="string">
            <text:p>Le Château</text:p>
          </table:table-cell>
        </table:table-row>
        <table:table-row table:style-name="ro5">
          <table:table-cell table:style-name="ce6" office:value-type="string" calcext:value-type="string">
            <text:p>Espace El Yasmine</text:p>
          </table:table-cell>
        </table:table-row>
        <table:table-row table:style-name="ro5">
          <table:table-cell table:style-name="ce6" office:value-type="string" calcext:value-type="string">
            <text:p>La Maison du Golfe</text:p>
          </table:table-cell>
        </table:table-row>
        <table:table-row table:style-name="ro5">
          <table:table-cell table:style-name="ce6" office:value-type="string" calcext:value-type="string">
            <text:p>La Villa Omar</text:p>
          </table:table-cell>
        </table:table-row>
        <table:table-row table:style-name="ro5">
          <table:table-cell table:style-name="ce6" office:value-type="string" calcext:value-type="string">
            <text:p>Dar Beldi</text:p>
          </table:table-cell>
        </table:table-row>
        <table:table-row table:style-name="ro5">
          <table:table-cell table:style-name="ce6" office:value-type="string" calcext:value-type="string">
            <text:p>Dar Vignola</text:p>
          </table:table-cell>
        </table:table-row>
        <table:table-row table:style-name="ro5" table:number-rows-repeated="1048446">
          <table:table-cell/>
        </table:table-row>
        <table:table-row table:style-name="ro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text loext:blank-width-char="€1">   </number:text>
    </number:number-style>
    <number:number-style style:name="N124">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0" number:min-decimal-places="0" number:min-integer-digits="1" number:grouping="true"/>
      <number:text loext:blank-width-char="€1">   </number:text>
    </number:number-style>
    <number:number-style style:name="N125">
      <style:text-properties fo:color="#ff0000"/>
      <number:text>-</number:text>
      <number:number number:decimal-places="0" number:min-decimal-places="0"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number number:decimal-places="2" number:min-decimal-places="2" number:min-integer-digits="1" number:grouping="true"/>
      <number:text loext:blank-width-char="€1">   </number:text>
    </number:number-style>
    <number:number-style style:name="N127">
      <style:text-properties fo:color="#ff0000"/>
      <number:text>-</number:text>
      <number:number number:decimal-places="2" number:min-decimal-places="2" number:min-integer-digits="1" number:grouping="true"/>
      <number:text loext:blank-width-char="€1">   </number:text>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8P1" style:volatile="true">
      <number:text>-</number:text>
      <number:fill-character> </number:fill-character>
      <number:number number:decimal-places="0" number:min-decimal-places="0" number:min-integer-digits="1" number:grouping="true"/>
      <number:text loext:blank-width-char="€1_-3">    </number:text>
    </number:number-style>
    <number:number-style style:name="N128P2" style:volatile="true">
      <number:text loext:blank-width-char="-"> </number:text>
      <number:fill-character> </number:fill-character>
      <number:text loext:blank-width-char="€2_-4">-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9P1" style:volatile="true">
      <number:text>-</number:text>
      <number:fill-character> </number:fill-character>
      <number:number number:decimal-places="0" number:min-decimal-places="0" number:min-integer-digits="1" number:grouping="true"/>
      <number:text loext:blank-width-char="-2"> € </number:text>
    </number:number-style>
    <number:number-style style:name="N129P2" style:volatile="true">
      <number:text loext:blank-width-char="-"> </number:text>
      <number:fill-character> </number:fill-character>
      <number:text loext:blank-width-char="-3">- €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0P1" style:volatile="true">
      <number:text>-</number:text>
      <number:fill-character> </number:fill-character>
      <number:number number:decimal-places="2" number:min-decimal-places="2" number:min-integer-digits="1" number:grouping="true"/>
      <number:text loext:blank-width-char="€1_-3">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1P1" style:volatile="true">
      <number:text>-</number:text>
      <number:fill-character> </number:fill-character>
      <number:number number:decimal-places="2" number:min-decimal-places="2" number:min-integer-digits="1" number:grouping="true"/>
      <number:text loext:blank-width-char="-2"> €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6T17:19:09</meta:creation-date>
    <dc:date>2026-07-17T21:01:52.314169200</dc:date>
    <meta:generator>LibreOffice/26.2.4.2$Windows_X86_64 LibreOffice_project/0229ac93fcf0d7cbc6376066c6f35021cef002dc</meta:generator>
    <meta:editing-duration>P1DT33M35S</meta:editing-duration>
    <meta:editing-cycles>11</meta:editing-cycles>
    <meta:document-statistic meta:table-count="2" meta:cell-count="233" meta:object-count="18"/>
    <meta:user-defined meta:name="AppVersion">12.0000</meta:user-defined>
  </office:meta>
</office:document-meta>
</file>